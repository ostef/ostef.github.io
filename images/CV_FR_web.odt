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7.0104in" style:rel-column-width="65535*"/>
    </style:style>
    <style:style style:name="Table5.1" style:family="table-row">
      <style:table-row-properties style:min-row-height="1.5347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3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1.2542in" style:rel-column-width="11724*"/>
    </style:style>
    <style:style style:name="Table2.B" style:family="table-column">
      <style:table-column-properties style:column-width="5.7563in" style:rel-column-width="53811*"/>
    </style:style>
    <style:style style:name="Table2.1" style:family="table-row">
      <style:table-row-properties style:min-row-height="0.0896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2.9347in" style:rel-column-width="27434*"/>
    </style:style>
    <style:style style:name="Table6.B" style:family="table-column">
      <style:table-column-properties style:column-width="4.0757in" style:rel-column-width="38101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1.8146in" style:rel-column-width="16963*"/>
    </style:style>
    <style:style style:name="Table10.B" style:family="table-column">
      <style:table-column-properties style:column-width="5.1958in" style:rel-column-width="48572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4" style:family="table">
      <style:table-properties style:width="7.0104in" table:align="margins"/>
    </style:style>
    <style:style style:name="Table14.A" style:family="table-column">
      <style:table-column-properties style:column-width="2.7556in" style:rel-column-width="25759*"/>
    </style:style>
    <style:style style:name="Table14.B" style:family="table-column">
      <style:table-column-properties style:column-width="4.2549in" style:rel-column-width="39776*"/>
    </style:style>
    <style:style style:name="Table14.1" style:family="table-row">
      <style:table-row-properties style:min-row-height="0.1854in"/>
    </style:style>
    <style:style style:name="Table14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2.184in" style:rel-column-width="20416*"/>
    </style:style>
    <style:style style:name="Table9.B" style:family="table-column">
      <style:table-column-properties style:column-width="4.8264in" style:rel-column-width="45119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1.5569in" style:rel-column-width="14554*"/>
    </style:style>
    <style:style style:name="Table4.B" style:family="table-column">
      <style:table-column-properties style:column-width="5.4535in" style:rel-column-width="50981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2.4417in" style:rel-column-width="22825*"/>
    </style:style>
    <style:style style:name="Table8.B" style:family="table-column">
      <style:table-column-properties style:column-width="4.5688in" style:rel-column-width="42710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708in"/>
    </style:style>
    <style:style style:name="Table7.B" style:family="table-column">
      <style:table-column-properties style:column-width="5.3757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4.5583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708in"/>
    </style:style>
    <style:style style:name="Table7.B" style:family="table-column">
      <style:table-column-properties style:column-width="5.3757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4.5583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2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e093ef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da4faa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63d3a6"/>
    </style:style>
    <style:style style:name="P6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officeooo:rsid="00d43627" officeooo:paragraph-rsid="00d43627" style:font-size-asian="18pt" style:font-size-complex="18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italic" fo:font-weight="bold" officeooo:rsid="00e31447" officeooo:paragraph-rsid="00e31447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italic" fo:font-weight="bold" officeooo:rsid="00e3dce9" officeooo:paragraph-rsid="00e3dce9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e093ef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line-height="100%"/>
      <style:text-properties style:font-name="Segoe UI" fo:font-size="10pt" fo:language="en" fo:country="US" fo:font-weight="bold" officeooo:rsid="00e093ef" officeooo:paragraph-rsid="00e093ef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Segoe UI" fo:font-size="12pt" fo:language="fr" fo:country="FR" officeooo:rsid="0031fed5" officeooo:paragraph-rsid="00e093ef" style:font-size-asian="18pt" style:font-size-complex="18pt"/>
    </style:style>
    <style:style style:name="P31" style:family="paragraph" style:parent-style-name="Subtitle">
      <style:paragraph-properties fo:margin-top="0in" fo:margin-bottom="0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3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33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34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e901ea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45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e093ef" style:font-size-asian="12pt" style:font-style-asian="italic" style:font-size-complex="12pt" style:font-style-complex="italic"/>
    </style:style>
    <style:style style:name="P46" style:family="paragraph" style:parent-style-name="Text_20_body">
      <style:paragraph-properties fo:line-height="100%" fo:text-align="justify" style:justify-single-word="false"/>
      <style:text-properties officeooo:rsid="00e093ef" officeooo:paragraph-rsid="00e093ef"/>
    </style:style>
    <style:style style:name="P47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48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49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50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51" style:family="paragraph" style:parent-style-name="Heading_20_1">
      <style:text-properties style:font-name="Segoe UI" fo:font-size="12pt" fo:language="fr" fo:country="FR" officeooo:rsid="0031fed5" officeooo:paragraph-rsid="00e093ef" style:font-size-asian="18pt" style:font-size-complex="18pt"/>
    </style:style>
    <style:style style:name="P52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53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54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fo:font-style="italic" fo:font-weight="bold" officeooo:rsid="00e31447" officeooo:paragraph-rsid="00e31447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688d7" officeooo:paragraph-rsid="00e688d7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688d7" officeooo:paragraph-rsid="00e688d7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678de" officeooo:paragraph-rsid="00e678de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dce9" officeooo:paragraph-rsid="00e3dce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3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dce9" officeooo:paragraph-rsid="00e3dce9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 style:list-style-name="L4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64" style:family="paragraph" style:parent-style-name="Text_20_body" style:list-style-name="L6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65" style:family="paragraph" style:parent-style-name="Text_20_body" style:list-style-name="L6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66" style:family="paragraph" style:parent-style-name="Text_20_body" style:list-style-name="L6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67" style:family="paragraph" style:parent-style-name="Text_20_body" style:list-style-name="L5">
      <style:paragraph-properties fo:line-height="100%" fo:text-align="justify" style:justify-single-word="false"/>
      <style:text-properties officeooo:paragraph-rsid="00e093ef"/>
    </style:style>
    <style:style style:name="P68" style:family="paragraph" style:parent-style-name="Text_20_body" style:list-style-name="L7">
      <style:paragraph-properties fo:line-height="100%" fo:text-align="justify" style:justify-single-word="false"/>
      <style:text-properties officeooo:paragraph-rsid="00c32e6c"/>
    </style:style>
    <style:style style:name="P69" style:family="paragraph" style:parent-style-name="Text_20_body" style:list-style-name="L8">
      <style:paragraph-properties fo:line-height="100%" fo:text-align="justify" style:justify-single-word="false"/>
      <style:text-properties officeooo:paragraph-rsid="00b697e5"/>
    </style:style>
    <style:style style:name="P7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e901ea"/>
    </style:style>
    <style:style style:name="P71" style:family="paragraph" style:parent-style-name="Text_20_body" style:list-style-name="L5">
      <style:paragraph-properties fo:line-height="100%" fo:text-align="justify" style:justify-single-word="false"/>
      <style:text-properties officeooo:rsid="00e093ef" officeooo:paragraph-rsid="00e093ef"/>
    </style:style>
    <style:style style:name="P72" style:family="paragraph" style:parent-style-name="Text_20_body" style:list-style-name="L5">
      <style:paragraph-properties fo:line-height="100%" fo:text-align="justify" style:justify-single-word="false"/>
      <style:text-properties fo:font-weight="normal" officeooo:rsid="00e13a83" officeooo:paragraph-rsid="00e13a83" style:font-weight-asian="normal" style:font-weight-complex="normal"/>
    </style:style>
    <style:style style:name="P73" style:family="paragraph" style:parent-style-name="Text_20_body" style:list-style-name="L5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e13a83" officeooo:paragraph-rsid="00e13a83" style:font-size-asian="18pt" style:font-style-asian="normal" style:font-weight-asian="normal" style:font-size-complex="18pt" style:font-style-complex="normal" style:font-weight-complex="normal"/>
    </style:style>
    <style:style style:name="P74" style:family="paragraph" style:parent-style-name="Text_20_body" style:list-style-name="L8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7">
      <style:paragraph-properties fo:line-height="100%" fo:text-align="justify" style:justify-single-word="false"/>
      <style:text-properties officeooo:rsid="00bae9d0" officeooo:paragraph-rsid="00c32e6c"/>
    </style:style>
    <style:style style:name="P76" style:family="paragraph" style:parent-style-name="Text_20_body" style:list-style-name="L7">
      <style:paragraph-properties fo:line-height="100%" fo:text-align="justify" style:justify-single-word="false"/>
      <style:text-properties officeooo:rsid="00aff2c1" officeooo:paragraph-rsid="00c32e6c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9ed54c"/>
    </style:style>
    <style:style style:name="T5" style:family="text">
      <style:text-properties style:font-name="Segoe UI" fo:language="fr" fo:country="FR" style:text-underline-style="none" officeooo:rsid="00a99a37"/>
    </style:style>
    <style:style style:name="T6" style:family="text">
      <style:text-properties style:font-name="Segoe UI" fo:language="fr" fo:country="FR" style:text-underline-style="none" officeooo:rsid="00e901ea"/>
    </style:style>
    <style:style style:name="T7" style:family="text">
      <style:text-properties style:font-name="Segoe UI" fo:language="fr" fo:country="FR" style:text-underline-style="none" officeooo:rsid="00eb4191"/>
    </style:style>
    <style:style style:name="T8" style:family="text">
      <style:text-properties style:font-name="Segoe UI" fo:language="fr" fo:country="FR" style:text-underline-style="none" officeooo:rsid="00eb4ed8"/>
    </style:style>
    <style:style style:name="T9" style:family="text">
      <style:text-properties style:font-name="Segoe UI" fo:font-size="10pt" fo:language="fr" fo:country="FR" style:text-underline-style="none" style:font-size-asian="12pt" style:font-size-complex="12pt"/>
    </style:style>
    <style:style style:name="T10" style:family="text">
      <style:text-properties style:font-name="Segoe UI" fo:font-size="10pt" fo:language="fr" fo:country="FR" style:text-underline-style="none" officeooo:rsid="005f9ab4" style:font-size-asian="12pt" style:font-size-complex="12pt"/>
    </style:style>
    <style:style style:name="T11" style:family="text">
      <style:text-properties style:font-name="Segoe UI" fo:font-size="10pt" fo:language="fr" fo:country="FR" style:text-underline-style="none" officeooo:rsid="00e901ea" style:font-size-asian="12pt" style:font-size-complex="12pt"/>
    </style:style>
    <style:style style:name="T12" style:family="text">
      <style:text-properties style:font-name="Segoe UI" fo:font-size="10pt" fo:language="fr" fo:country="FR" style:text-underline-style="none" officeooo:rsid="009ed54c" style:font-size-asian="12pt" style:font-size-complex="12pt"/>
    </style:style>
    <style:style style:name="T13" style:family="text">
      <style:text-properties style:font-name="Segoe UI" fo:font-size="10pt" fo:language="fr" fo:country="FR" style:text-underline-style="none" officeooo:rsid="00e901ea" style:font-size-asian="10pt" style:font-size-complex="10pt"/>
    </style:style>
    <style:style style:name="T14" style:family="text">
      <style:text-properties style:font-name="Segoe UI" fo:font-size="10pt" fo:language="fr" fo:country="FR" fo:font-weight="bold" officeooo:rsid="009ce347" style:font-size-asian="18pt" style:font-weight-asian="bold" style:font-size-complex="18pt" style:font-weight-complex="bold"/>
    </style:style>
    <style:style style:name="T15" style:family="text">
      <style:text-properties style:font-name="Segoe UI" fo:font-size="12pt" fo:language="fr" fo:country="FR" style:font-size-asian="18pt" style:font-size-complex="18pt"/>
    </style:style>
    <style:style style:name="T16" style:family="text">
      <style:text-properties style:font-name="Segoe UI" fo:font-size="12pt" fo:language="fr" fo:country="FR" officeooo:rsid="00a99a37" style:font-size-asian="18pt" style:font-size-complex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d250e" style:font-weight-asian="bold" style:font-weight-complex="bold"/>
    </style:style>
    <style:style style:name="T19" style:family="text">
      <style:text-properties fo:font-weight="bold" officeooo:rsid="003f18cf" style:font-weight-asian="bold" style:font-weight-complex="bold"/>
    </style:style>
    <style:style style:name="T20" style:family="text">
      <style:text-properties fo:font-weight="bold" officeooo:rsid="00718120" style:font-weight-asian="bold" style:font-weight-complex="bold"/>
    </style:style>
    <style:style style:name="T21" style:family="text">
      <style:text-properties fo:font-weight="bold" officeooo:rsid="002a7ede" style:font-weight-asian="bold" style:font-weight-complex="bold"/>
    </style:style>
    <style:style style:name="T22" style:family="text">
      <style:text-properties fo:font-weight="bold" officeooo:rsid="0035937d" style:font-weight-asian="bold" style:font-weight-complex="bold"/>
    </style:style>
    <style:style style:name="T23" style:family="text">
      <style:text-properties fo:color="#808080" loext:opacity="100%" fo:font-style="italic" style:font-style-asian="italic" style:font-style-complex="italic"/>
    </style:style>
    <style:style style:name="T24" style:family="text">
      <style:text-properties fo:color="#808080" loext:opacity="100%" fo:font-style="italic" officeooo:rsid="00525f52" style:font-style-asian="italic" style:font-style-complex="italic"/>
    </style:style>
    <style:style style:name="T25" style:family="text">
      <style:text-properties fo:color="#808080" loext:opacity="100%" fo:font-style="italic" officeooo:rsid="003d250e" style:font-style-asian="italic" style:font-style-complex="italic"/>
    </style:style>
    <style:style style:name="T26" style:family="text">
      <style:text-properties fo:color="#808080" loext:opacity="100%" fo:font-style="italic" officeooo:rsid="002a7ede" style:font-style-asian="italic" style:font-style-complex="italic"/>
    </style:style>
    <style:style style:name="T27" style:family="text">
      <style:text-properties fo:color="#808080" loext:opacity="100%" fo:font-style="italic" officeooo:rsid="00533f84" style:font-style-asian="italic" style:font-style-complex="italic"/>
    </style:style>
    <style:style style:name="T28" style:family="text">
      <style:text-properties fo:color="#808080" loext:opacity="100%" fo:font-style="italic" officeooo:rsid="00a0d1f3" style:font-style-asian="italic" style:font-style-complex="italic"/>
    </style:style>
    <style:style style:name="T29" style:family="text">
      <style:text-properties fo:color="#808080" loext:opacity="100%" fo:font-style="italic" style:font-size-asian="12pt" style:font-style-asian="italic" style:font-style-complex="italic"/>
    </style:style>
    <style:style style:name="T30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1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32" style:family="text">
      <style:text-properties officeooo:rsid="003d250e"/>
    </style:style>
    <style:style style:name="T33" style:family="text">
      <style:text-properties officeooo:rsid="00718120"/>
    </style:style>
    <style:style style:name="T34" style:family="text">
      <style:text-properties officeooo:rsid="0043464b"/>
    </style:style>
    <style:style style:name="T35" style:family="text">
      <style:text-properties officeooo:rsid="005aa6b7"/>
    </style:style>
    <style:style style:name="T36" style:family="text">
      <style:text-properties officeooo:rsid="005d7836"/>
    </style:style>
    <style:style style:name="T37" style:family="text">
      <style:text-properties officeooo:rsid="006555ef"/>
    </style:style>
    <style:style style:name="T38" style:family="text">
      <style:text-properties officeooo:rsid="005b9277"/>
    </style:style>
    <style:style style:name="T39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e093ef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e13a8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Segoe UI" fo:font-size="10pt" fo:language="fr" fo:country="FR" fo:font-style="normal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00" loext:opacity="100%" style:font-name="Segoe UI" fo:font-size="10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000000" loext:opacity="100%" style:font-name="Segoe UI" fo:font-size="10pt" fo:language="fr" fo:country="FR" fo:font-style="normal" style:font-size-asian="18pt" style:font-style-asian="normal" style:font-size-complex="18pt" style:font-style-complex="normal"/>
    </style:style>
    <style:style style:name="T57" style:family="text">
      <style:text-properties fo:color="#000000" loext:opacity="100%" style:font-name="Segoe UI" fo:font-size="10pt" fo:language="fr" fo:country="FR" fo:font-style="normal" officeooo:rsid="009ce347" style:font-size-asian="18pt" style:font-style-asian="normal" style:font-size-complex="18pt" style:font-style-complex="normal"/>
    </style:style>
    <style:style style:name="T58" style:family="text">
      <style:text-properties fo:color="#000000" loext:opacity="100%" style:font-name="Segoe UI" fo:font-size="10pt" fo:language="fr" fo:country="FR" fo:font-style="normal" officeooo:rsid="00e70f8a" style:font-size-asian="18pt" style:font-style-asian="normal" style:font-size-complex="18pt" style:font-style-complex="normal"/>
    </style:style>
    <style:style style:name="T59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color="#000000" loext:opacity="100%" style:font-name="Segoe UI" fo:font-size="10pt" fo:language="fr" fo:country="FR" fo:font-style="italic" fo:font-weight="normal" officeooo:rsid="0093a513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color="#000000" loext:opacity="100%" style:font-name="Segoe UI" fo:font-size="10pt" fo:language="fr" fo:country="FR" fo:font-style="italic" fo:font-weight="normal" officeooo:rsid="001f0c54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65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66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67" style:family="text">
      <style:text-properties officeooo:rsid="002a7ede"/>
    </style:style>
    <style:style style:name="T68" style:family="text">
      <style:text-properties officeooo:rsid="00255948"/>
    </style:style>
    <style:style style:name="T69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70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71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72" style:family="text">
      <style:text-properties fo:language="en" fo:country="US"/>
    </style:style>
    <style:style style:name="T73" style:family="text">
      <style:text-properties fo:language="en" fo:country="US" officeooo:rsid="00a37664"/>
    </style:style>
    <style:style style:name="T74" style:family="text">
      <style:text-properties fo:language="en" fo:country="US" officeooo:rsid="00d6120c"/>
    </style:style>
    <style:style style:name="T75" style:family="text">
      <style:text-properties fo:language="en" fo:country="US" officeooo:rsid="00da4faa"/>
    </style:style>
    <style:style style:name="T76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7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8" style:family="text">
      <style:text-properties officeooo:rsid="0086e331"/>
    </style:style>
    <style:style style:name="T79" style:family="text">
      <style:text-properties officeooo:rsid="00876097"/>
    </style:style>
    <style:style style:name="T80" style:family="text">
      <style:text-properties officeooo:rsid="00946146"/>
    </style:style>
    <style:style style:name="T8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673add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b2f23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3d250e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a08645" style:font-style-asian="italic" style:font-weight-asian="normal" style:font-style-complex="italic" style:font-weight-complex="normal"/>
    </style:style>
    <style:style style:name="T86" style:family="text">
      <style:text-properties officeooo:rsid="00a0d1f3"/>
    </style:style>
    <style:style style:name="T87" style:family="text">
      <style:text-properties officeooo:rsid="00aff2c1"/>
    </style:style>
    <style:style style:name="T88" style:family="text">
      <style:text-properties officeooo:rsid="00bc86b0"/>
    </style:style>
    <style:style style:name="T89" style:family="text">
      <style:text-properties officeooo:rsid="00bcac9d"/>
    </style:style>
    <style:style style:name="T90" style:family="text">
      <style:text-properties officeooo:rsid="00cbcbf0"/>
    </style:style>
    <style:style style:name="T91" style:family="text">
      <style:text-properties officeooo:rsid="00d128f8"/>
    </style:style>
    <style:style style:name="T92" style:family="text">
      <style:text-properties officeooo:rsid="00d43627"/>
    </style:style>
    <style:style style:name="T93" style:family="text">
      <style:text-properties officeooo:rsid="00d6120c"/>
    </style:style>
    <style:style style:name="T94" style:family="text">
      <style:text-properties officeooo:rsid="00da4faa"/>
    </style:style>
    <style:style style:name="T95" style:family="text">
      <style:text-properties fo:font-size="10pt" fo:language="fr" fo:country="FR"/>
    </style:style>
    <style:style style:name="T96" style:family="text">
      <style:text-properties fo:font-size="10pt" fo:language="fr" fo:country="FR" officeooo:rsid="009ce347"/>
    </style:style>
    <style:style style:name="T97" style:family="text">
      <style:text-properties fo:font-size="10pt" fo:language="fr" fo:country="FR" fo:font-weight="bold" style:font-weight-asian="bold" style:font-weight-complex="bold"/>
    </style:style>
    <style:style style:name="T98" style:family="text">
      <style:text-properties officeooo:rsid="00dd20e8"/>
    </style:style>
    <style:style style:name="T99" style:family="text">
      <style:text-properties officeooo:rsid="00dea81c"/>
    </style:style>
    <style:style style:name="T100" style:family="text">
      <style:text-properties fo:font-weight="normal" officeooo:rsid="003d250e" style:font-weight-asian="normal" style:font-weight-complex="normal"/>
    </style:style>
    <style:style style:name="T101" style:family="text">
      <style:text-properties fo:font-weight="normal" officeooo:rsid="00a08645" style:font-weight-asian="normal" style:font-weight-complex="normal"/>
    </style:style>
    <style:style style:name="T102" style:family="text">
      <style:text-properties officeooo:rsid="00e3dce9"/>
    </style:style>
    <style:style style:name="T103" style:family="text">
      <style:text-properties officeooo:rsid="00e48b37"/>
    </style:style>
    <style:style style:name="T104" style:family="text">
      <style:text-properties officeooo:rsid="00e98c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St<text:span text:style-name="T1">é</text:span>fan OUMANSOUR</text:p>
            <text:p text:style-name="P31">Développeur <text:span text:style-name="T98">Web Full-Sta</text:span><text:span text:style-name="T99">ck</text:span></text:p>
            <text:p text:style-name="P32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9">Lyon, France</text:p>
                  <text:p text:style-name="P9"><text:span text:style-name="T2">+33 </text:span>6 95 64 26 91</text:p>
                  <text:p text:style-name="P6"><text:a xlink:type="simple" xlink:href="mailto:oumansour.stefan@gmail.com" text:style-name="Internet_20_link" text:visited-style-name="Visited_20_Internet_20_Link"><text:span text:style-name="T9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53" text:outline-level="2" text:is-list-header="true">GitHub :</text:h>
                      </table:table-cell>
                      <table:table-cell table:style-name="Table3.A1" office:value-type="string">
                        <text:h text:style-name="P54" text:outline-level="2" text:is-list-header="true"><text:a xlink:type="simple" xlink:href="https://github.com/ostef" text:style-name="Internet_20_link" text:visited-style-name="Visited_20_Internet_20_Link"><text:span text:style-name="T69">https://</text:span><text:span text:style-name="T70">github.com/</text:span><text:span text:style-name="T71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p text:style-name="P37"><text:span text:style-name="T76">L</text:span><text:span text:style-name="T77">inkedin :</text:span></text:p>
                      </table:table-cell>
                      <table:table-cell table:style-name="Table3.A1" office:value-type="string">
                        <text:p text:style-name="P47">@oumansour-stefan</text:p>
                      </table:table-cell>
                    </table:table-row>
                  </table:table>
                </table:table-cell>
              </table:table-row>
            </table:table>
            <text:p text:style-name="P5"><text:span text:style-name="T9"/></text:p>
          </table:table-cell>
        </table:table-row>
      </table:table>
      <text:p text:style-name="P36"><text:span text:style-name="T5"/></text:p>
      <text:p text:style-name="P70"><text:span text:style-name="T10">Je suis un développeur passionné </text:span><text:span text:style-name="T11">avec une solide expérience en programmation</text:span><text:span text:style-name="T12">. </text:span><text:span text:style-name="T11">À l’aise aussi bien en front-end qu’en back-end, je prend plaisir à concevoir des architectures robustes et des interfaces utilisateurs soignées. </text:span><text:span text:style-name="T13">De par mon background en jeu vidéo, je suis particulièrement attentif aux enjeux de performance, à la gestion d'états complexes et aux contraintes des systèmes temps réel.</text:span></text:p>
      <text:h text:style-name="P48" text:outline-level="1" text:is-list-header="true">COMPÉTENCES<text:span text:style-name="T16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4">Langages :</text:p>
          </table:table-cell>
          <table:table-cell table:style-name="Table13.A1" office:value-type="string">
            <text:p text:style-name="P22"><text:span text:style-name="T92">Javascript, Typescript, </text:span><text:span text:style-name="T93">PHP, </text:span><text:span text:style-name="T92">Python, Go, C#, </text:span>C++, <text:span text:style-name="T68">C</text:span></text:p>
          </table:table-cell>
        </table:table-row>
        <table:table-row table:style-name="Table13.2">
          <table:table-cell table:style-name="Table13.A1" office:value-type="string">
            <text:p text:style-name="P34">Technologies :</text:p>
          </table:table-cell>
          <table:table-cell table:style-name="Table13.A1" office:value-type="string">
            <text:p text:style-name="P23"><text:span text:style-name="T72">Vue</text:span><text:span text:style-name="T75">JS</text:span><text:span text:style-name="T72">, Nest</text:span><text:span text:style-name="T75">JS</text:span><text:span text:style-name="T72">, Node.</text:span><text:span text:style-name="T74">js</text:span><text:span text:style-name="T72">, PostgreSQL, MySQL, Docker, </text:span><text:span text:style-name="T73">G</text:span><text:span text:style-name="T72">it, Linux</text:span></text:p>
          </table:table-cell>
        </table:table-row>
        <table:table-row table:style-name="Table13.3">
          <table:table-cell table:style-name="Table13.A1" office:value-type="string">
            <text:p text:style-name="P35">Langues :</text:p>
          </table:table-cell>
          <table:table-cell table:style-name="Table13.A1" office:value-type="string">
            <text:p text:style-name="P21">Français, Anglais</text:p>
          </table:table-cell>
        </table:table-row>
      </table:table>
      <text:h text:style-name="P49" text:outline-level="1" text:is-list-header="true">EXPÉRIENCES PROFESSIONNELLES<text:span text:style-name="T1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Freelancing</text:p>
          </table:table-cell>
          <table:table-cell table:style-name="Table2.A1" office:value-type="string">
            <text:p text:style-name="P7"><text:span text:style-name="T28">Janvier 2026 </text:span><text:span text:style-name="T23">– </text:span><text:span text:style-name="T28">présent</text:span></text:p>
          </table:table-cell>
        </table:table-row>
      </table:table>
      <text:p text:style-name="P13"><text:span text:style-name="T86">Missions freelance dans le web (</text:span><text:span text:style-name="T90">fullstack </text:span><text:span text:style-name="T86">VueJS, NestJS, 3D ThreeJS, PHP Symfon</text:span><text:span text:style-name="T87">y</text:span><text:span text:style-name="T86">) :</text:span></text:p>
      <text:p text:style-name="P55">Module back-office (PHP Symfony, MySQL) :</text:p>
      <text:list text:style-name="L1">
        <text:list-item>
          <text:p text:style-name="P56">Développement d’un module de gestion automatique d’annuités à payer : statut, échéances, retards et surtaxes</text:p>
        </text:list-item>
        <text:list-item>
          <text:p text:style-name="P56">Intégration au sein d’un back-office existant et complexe en PHP Synfony avec une base de données MySQL</text:p>
        </text:list-item>
        <text:list-item>
          <text:p text:style-name="P56">Mise en place de règles métier complexes</text:p>
        </text:list-item>
        <text:list-item>
          <text:p text:style-name="P58">Deploiement avec Coolify</text:p>
        </text:list-item>
      </text:list>
      <text:p text:style-name="P25">Plateforme client (VueJS, NestJS, PostgreSQL) :</text:p>
      <text:list text:style-name="L2">
        <text:list-item>
          <text:p text:style-name="P57">Création from scratch d’une application web permettant aux clients de consulter, payer ou abandonner leurs annuités</text:p>
        </text:list-item>
        <text:list-item>
          <text:p text:style-name="P57">Développement de l’API REST avec NestJS</text:p>
        </text:list-item>
        <text:list-item>
          <text:p text:style-name="P57">Base de donnée PostgreSQL avec Typeorm</text:p>
        </text:list-item>
        <text:list-item>
          <text:p text:style-name="P57">Interface VueJS réactive, tableaux d’annuités avec pagination</text:p>
        </text:list-item>
        <text:list-item>
          <text:p text:style-name="P60">Double authentification</text:p>
        </text:list-item>
        <text:list-item>
          <text:p text:style-name="P61">Système de paiement avec Stripe</text:p>
        </text:list-item>
        <text:list-item>
          <text:p text:style-name="P57">Mise en place d’une communication sécurisée entre le back-office et la plateforme web</text:p>
        </text:list-item>
        <text:list-item>
          <text:p text:style-name="P59">Deploiement avec Coolify</text:p>
        </text:list-item>
      </text:list>
      <text:p text:style-name="P27"/>
      <text:p text:style-name="P26">Shop de trophée de randonnée 3D (VueJS, ThreeJS, Python Flask) :</text:p>
      <text:list text:style-name="L3">
        <text:list-item>
          <text:p text:style-name="P62">Génération 3D de trophée à partir de données GPS et d’élevation avec ThreeJS</text:p>
        </text:list-item>
        <text:list-item>
          <text:p text:style-name="P62">Gestion des pa<text:span text:style-name="T103">iements avec Stripe</text:span></text:p>
        </text:list-item>
      </text:list>
      <text:p text:style-name="P14"><text:span text:style-name="T15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8">Développeur </text:span><text:span text:style-name="T20">de </text:span><text:span text:style-name="T19">jeu vidéo</text:span><text:span text:style-name="T18">,</text:span><text:span text:style-name="T21"> </text:span><text:span text:style-name="T17">Fomenko</text:span></text:p>
          </table:table-cell>
          <table:table-cell table:style-name="Table6.A1" office:value-type="string">
            <text:p text:style-name="P8"><text:span text:style-name="T24">M</text:span><text:span text:style-name="T25">ars</text:span><text:span text:style-name="T26"> </text:span><text:span text:style-name="T23">2024 – </text:span><text:span text:style-name="T27">J</text:span><text:span text:style-name="T25">uillet</text:span><text:span text:style-name="T26"> </text:span><text:span text:style-name="T23">2025</text:span></text:p>
          </table:table-cell>
        </table:table-row>
      </table:table>
      <text:p text:style-name="P12"><text:span text:style-name="T32">Développement d’un </text:span><text:span text:style-name="T33">moteur de </text:span><text:span text:style-name="T32">jeu vidéo, moteur de rendu et </text:span><text:span text:style-name="T34">é</text:span><text:span text:style-name="T32">diteur en </text:span><text:span text:style-name="T82">C++</text:span><text:span text:style-name="T100">, </text:span><text:span text:style-name="T83">DirectX</text:span><text:span text:style-name="T100"> et </text:span><text:span text:style-name="T84">Metal</text:span><text:span text:style-name="T100"> </text:span><text:span text:style-name="T32">chez Fomenko </text:span><text:span text:style-name="T91">pour un jeu d’aventure/énigmes</text:span><text:span text:style-name="T32">:</text:span></text:p>
      <text:list text:style-name="L4">
        <text:list-item>
          <text:p text:style-name="P63">Moteur de rendu PBR</text:p>
        </text:list-item>
        <text:list-item>
          <text:p text:style-name="P63">Framework d’interface graphique</text:p>
        </text:list-item>
        <text:list-item>
          <text:p text:style-name="P63">Editeur de monde et placement d’objets, <text:span text:style-name="T104">outils de painting de terrain et de végetation</text:span></text:p>
        </text:list-item>
      </text:list>
      <text:h text:style-name="P51" text:outline-level="1" text:is-list-header="true"><text:soft-page-break/>PROJET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8">Jeu de pong en ligne</text:p>
          </table:table-cell>
          <table:table-cell table:style-name="Table10.A1" office:value-type="string">
            <text:p text:style-name="P45">2023</text:p>
          </table:table-cell>
        </table:table-row>
      </table:table>
      <text:p text:style-name="P3"><text:span text:style-name="T47">Application web full-stack en </text:span><text:span text:style-name="T60">Typescript</text:span><text:span text:style-name="T47"> avec </text:span><text:span text:style-name="T59">VueJS</text:span><text:span text:style-name="T47"> et </text:span><text:span text:style-name="T59">NestJS </text:span><text:span text:style-name="T47">:</text:span></text:p>
      <text:list text:style-name="L5">
        <text:list-item>
          <text:p text:style-name="P67"><text:span text:style-name="T50">J</text:span><text:span text:style-name="T48">eu de pong </text:span><text:span text:style-name="T47">basé sur </text:span><text:span text:style-name="T54">Websockets</text:span></text:p>
        </text:list-item>
        <text:list-item>
          <text:p text:style-name="P67"><text:span text:style-name="T52">S</text:span><text:span text:style-name="T47">ystème d’authentification </text:span><text:span text:style-name="T52">sécurisé </text:span><text:span text:style-name="T47">2FA,</text:span></text:p>
        </text:list-item>
        <text:list-item>
          <text:p text:style-name="P67"><text:span text:style-name="T50">C</text:span><text:span text:style-name="T47">hat en temps réel </text:span><text:span text:style-name="T50">avec channels </text:span><text:span text:style-name="T52">publics/privés, rôles utilisateurs, messages directs</text:span></text:p>
        </text:list-item>
        <text:list-item>
          <text:p text:style-name="P71"><text:span text:style-name="T96">S</text:span><text:span text:style-name="T95">ystème de profils joueur avec historique des matchs, statistiques et classements</text:span></text:p>
        </text:list-item>
        <text:list-item>
          <text:p text:style-name="P71"><text:span text:style-name="T96">A</text:span><text:span text:style-name="T95">rchitecture microservices avec NesJS, base de donnée </text:span><text:span text:style-name="T97">PostgreSQL</text:span></text:p>
        </text:list-item>
      </text:list>
      <text:p text:style-name="P30"><text:span text:style-name="T45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9">Application mobile de rencontres</text:p>
          </table:table-cell>
          <table:table-cell table:style-name="Table14.A1" office:value-type="string">
            <text:p text:style-name="P45">202<text:span text:style-name="T102">4</text:span></text:p>
          </table:table-cell>
        </table:table-row>
      </table:table>
      <text:p text:style-name="P3"><text:span text:style-name="T47">Application web </text:span><text:span text:style-name="T53">et mobile de mise en relation type Tinder </text:span><text:span text:style-name="T47">en </text:span><text:span text:style-name="T60">Typescript</text:span><text:span text:style-name="T47"> avec </text:span><text:span text:style-name="T59">VueJS</text:span><text:span text:style-name="T47"> et </text:span><text:span text:style-name="T59">NestJS </text:span><text:span text:style-name="T47">:</text:span></text:p>
      <text:list text:continue-numbering="true" text:style-name="L5">
        <text:list-item>
          <text:p text:style-name="P72"><text:span text:style-name="T57">S</text:span><text:span text:style-name="T56">ystème de stack de profils et matching basé sur des critères de compatibilité et de localisation</text:span></text:p>
        </text:list-item>
        <text:list-item>
          <text:p text:style-name="P72"><text:span text:style-name="T56">Messagerie instantanée entre utilisateurs </text:span><text:span text:style-name="T58">via</text:span><text:span text:style-name="T56"> </text:span><text:span text:style-name="T55">Websockets</text:span></text:p>
        </text:list-item>
        <text:list-item>
          <text:p text:style-name="P73">Notifications temps réel (likes, messages)</text:p>
        </text:list-item>
        <text:list-item>
          <text:p text:style-name="P73">Gestion des profils : photos, centres d’intérêts, localisation approximative</text:p>
        </text:list-item>
      </text:list>
      <text:p text:style-name="P46"><text:span text:style-name="T14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79">Vk-Engine, m</text:span><text:span text:style-name="T78">oteur de jeu</text:span></text:p>
          </table:table-cell>
          <table:table-cell table:style-name="Table9.A1" office:value-type="string">
            <text:p text:style-name="P42">202<text:span text:style-name="T35">4 - </text:span><text:span text:style-name="T36">présent</text:span></text:p>
          </table:table-cell>
        </table:table-row>
      </table:table>
      <text:p text:style-name="P16">Moteur de jeu <text:span text:style-name="T37">avec un moteur de rendu </text:span>en <text:span text:style-name="T85">C++</text:span><text:span text:style-name="T101"> et </text:span><text:span text:style-name="T81">Vulkan</text:span><text:span text:style-name="T38">, </text:span><text:span text:style-name="T37">un</text:span><text:span text:style-name="T38"> </text:span>système d’entité<text:span text:style-name="T38">s</text:span>, <text:span text:style-name="T37">un </text:span>système d’assets, <text:span text:style-name="T80">un éditeur et un moteur physique :</text:span></text:p>
      <text:list text:style-name="L6">
        <text:list-item>
          <text:p text:style-name="P64">Moteur de rendu <text:span text:style-name="T94">3d</text:span></text:p>
        </text:list-item>
        <text:list-item>
          <text:p text:style-name="P65">Système d’entités et de composants performant</text:p>
        </text:list-item>
        <text:list-item>
          <text:p text:style-name="P66">Editeur ImGui complet : multi-viewport, gizmos de transformation, gestion de scènes, <text:span text:style-name="T88">éditeur de matériaux</text:span></text:p>
        </text:list-item>
        <text:list-item>
          <text:p text:style-name="P66">Intégration <text:span text:style-name="T89">avec le </text:span>moteur physique Jolt</text:p>
        </text:list-item>
      </text:list>
      <text:p text:style-name="P4"><text:span text:style-name="T96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Minecraft clone</text:p>
          </table:table-cell>
          <table:table-cell table:style-name="Table4.A1" office:value-type="string">
            <text:p text:style-name="P43">2023</text:p>
          </table:table-cell>
        </table:table-row>
      </table:table>
      <text:p text:style-name="P1"><text:span text:style-name="T40">Recréation du jeu vidéo </text:span><text:span text:style-name="T41">Minecraft </text:span><text:span text:style-name="T40">en </text:span><text:span text:style-name="T61">C++</text:span><text:span text:style-name="T42"> </text:span><text:span text:style-name="T40">avec </text:span><text:span text:style-name="T62">OpenGL </text:span><text:span text:style-name="T41">:</text:span></text:p>
      <text:list text:style-name="L7">
        <text:list-item>
          <text:p text:style-name="P68"><text:span text:style-name="T46">G</text:span><text:span text:style-name="T43">énération de terrain basée sur le même fonctionneme</text:span><text:span text:style-name="T44">nt que le </text:span><text:span text:style-name="T43">jeu original</text:span></text:p>
        </text:list-item>
        <text:list-item>
          <text:p text:style-name="P75"><text:span text:style-name="T43">R</text:span><text:span text:style-name="T39">endus de chunks, gestion de la transparence, animations</text:span></text:p>
        </text:list-item>
        <text:list-item>
          <text:p text:style-name="P76"><text:span text:style-name="T43">C</text:span><text:span text:style-name="T39">ollisions avec le terrain</text:span></text:p>
        </text:list-item>
        <text:list-item>
          <text:p text:style-name="P68"><text:span text:style-name="T65">Editeur </text:span><text:span text:style-name="T66">avec la librairie ImGui</text:span></text:p>
        </text:list-item>
      </text:list>
      <text:p text:style-name="P1"><text:span text:style-name="T6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Langage de programmation</text:p>
          </table:table-cell>
          <table:table-cell table:style-name="Table8.A1" office:value-type="string">
            <text:p text:style-name="P44">2024 - présent</text:p>
          </table:table-cell>
        </table:table-row>
      </table:table>
      <text:p text:style-name="P15"><text:span text:style-name="T63">Développement d’un langage de programmation </text:span><text:span text:style-name="T64">bas niveau :</text:span></text:p>
      <text:list text:style-name="L8">
        <text:list-item>
          <text:p text:style-name="P74">Typage statique</text:p>
        </text:list-item>
        <text:list-item>
          <text:p text:style-name="P74">Structs, pointeurs, tableaux, fonctions avec overloading</text:p>
        </text:list-item>
        <text:list-item>
          <text:p text:style-name="P74">Appels dynamiques à des librairies C</text:p>
        </text:list-item>
        <text:list-item>
          <text:p text:style-name="P69"><text:span text:style-name="T49">Exécution d</text:span><text:span text:style-name="T51">e code </text:span><text:span text:style-name="T49">arbitraire au compile time</text:span></text:p>
        </text:list-item>
      </text:list>
      <text:p text:style-name="P2"><text:span text:style-name="T47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50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9">École 42 </text:span><text:span text:style-name="T21">Lyon, </text:span><text:span text:style-name="T22">France</text:span></text:p>
                </table:table-cell>
                <table:table-cell table:style-name="Table7.A1" office:value-type="string">
                  <text:p text:style-name="P24"><text:span text:style-name="T67"><text:s/></text:span><text:span text:style-name="T29">2021 - </text:span><text:span text:style-name="T31">2026</text:span></text:p>
                </table:table-cell>
              </table:table-row>
            </table:table>
            <text:p text:style-name="P39">Expert en architecture informatique</text:p>
            <text:p text:style-name="P38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0"><text:span text:style-name="T22">L</text:span><text:span text:style-name="T17">ycée Colbert, Tourcoing, France</text:span></text:p>
                </table:table-cell>
                <table:table-cell table:style-name="Table1.A1" office:value-type="string">
                  <text:p text:style-name="P24"><text:span text:style-name="T67"><text:s/></text:span><text:span text:style-name="T29">2</text:span><text:span text:style-name="T30">018 - 2020</text:span></text:p>
                </table:table-cell>
              </table:table-row>
            </table:table>
            <text:p text:style-name="P41">Bac S option Sciences de l’Ingénieur</text:p>
          </table:table-cell>
        </table:table-row>
      </table:table>
      <text:h text:style-name="P5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9T14:46:42.252323677</dc:date>
    <meta:editing-duration>PT13H18M6S</meta:editing-duration>
    <meta:editing-cycles>199</meta:editing-cycles>
    <meta:generator>LibreOffice/24.2.7.2$Linux_X86_64 LibreOffice_project/420$Build-2</meta:generator>
    <meta:print-date>2026-06-09T14:40:44.518744396</meta:print-date>
    <meta:printed-by>PDF files</meta:printed-by>
    <meta:document-statistic meta:table-count="14" meta:image-count="0" meta:object-count="0" meta:page-count="2" meta:paragraph-count="88" meta:word-count="633" meta:character-count="4024" meta:non-whitespace-character-count="3513"/>
  </office:meta>
</office:document-meta>
</file>