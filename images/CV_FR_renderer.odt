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0104in" table:align="margins"/>
    </style:style>
    <style:style style:name="Table5.A" style:family="table-column">
      <style:table-column-properties style:column-width="7.0104in" style:rel-column-width="10095*"/>
    </style:style>
    <style:style style:name="Table5.1" style:family="table-row">
      <style:table-row-properties style:min-row-height="1.2882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1007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86in" style:rel-column-width="1366*"/>
    </style:style>
    <style:style style:name="Table3.B" style:family="table-column">
      <style:table-column-properties style:column-width="2.134in" style:rel-column-width="3073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0618in"/>
    </style:style>
    <style:style style:name="Table13" style:family="table">
      <style:table-properties style:width="7.0104in" table:align="margins"/>
    </style:style>
    <style:style style:name="Table13.A" style:family="table-column">
      <style:table-column-properties style:column-width="1.2854in" style:rel-column-width="12017*"/>
    </style:style>
    <style:style style:name="Table13.B" style:family="table-column">
      <style:table-column-properties style:column-width="5.725in" style:rel-column-width="53518*"/>
    </style:style>
    <style:style style:name="Table13.1" style:family="table-row">
      <style:table-row-properties style:min-row-height="0.0674in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0576in"/>
    </style:style>
    <style:style style:name="Table13.4" style:family="table-row">
      <style:table-row-properties style:min-row-height="0.1347in"/>
    </style:style>
    <style:style style:name="Table2" style:family="table">
      <style:table-properties style:width="7.0104in" table:align="margins"/>
    </style:style>
    <style:style style:name="Table2.A" style:family="table-column">
      <style:table-column-properties style:column-width="1.1535in" style:rel-column-width="1661*"/>
    </style:style>
    <style:style style:name="Table2.B" style:family="table-column">
      <style:table-column-properties style:column-width="5.8569in" style:rel-column-width="8434*"/>
    </style:style>
    <style:style style:name="Table2.1" style:family="table-row">
      <style:table-row-properties style:min-row-height="0.2125in"/>
    </style:style>
    <style:style style:name="Table2.A1" style:family="table-cell">
      <style:table-cell-properties fo:padding="0in" fo:border="none"/>
    </style:style>
    <style:style style:name="Table6" style:family="table">
      <style:table-properties style:width="7.0104in" table:align="margins"/>
    </style:style>
    <style:style style:name="Table6.A" style:family="table-column">
      <style:table-column-properties style:column-width="3.525in" style:rel-column-width="5076*"/>
    </style:style>
    <style:style style:name="Table6.B" style:family="table-column">
      <style:table-column-properties style:column-width="3.4854in" style:rel-column-width="5019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7.0104in" table:align="margins"/>
    </style:style>
    <style:style style:name="Table9.A" style:family="table-column">
      <style:table-column-properties style:column-width="2.0944in" style:rel-column-width="19579*"/>
    </style:style>
    <style:style style:name="Table9.B" style:family="table-column">
      <style:table-column-properties style:column-width="4.916in" style:rel-column-width="45956*"/>
    </style:style>
    <style:style style:name="Table9.1" style:family="table-row">
      <style:table-row-properties style:min-row-height="0.1569in"/>
    </style:style>
    <style:style style:name="Table9.A1" style:family="table-cell">
      <style:table-cell-properties fo:padding="0in" fo:border="none"/>
    </style:style>
    <style:style style:name="Table4" style:family="table">
      <style:table-properties style:width="7.0104in" table:align="margins"/>
    </style:style>
    <style:style style:name="Table4.A" style:family="table-column">
      <style:table-column-properties style:column-width="1.4111in" style:rel-column-width="13191*"/>
    </style:style>
    <style:style style:name="Table4.B" style:family="table-column">
      <style:table-column-properties style:column-width="5.5993in" style:rel-column-width="52344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7.0104in" table:align="margins"/>
    </style:style>
    <style:style style:name="Table8.A" style:family="table-column">
      <style:table-column-properties style:column-width="2.2847in" style:rel-column-width="21358*"/>
    </style:style>
    <style:style style:name="Table8.B" style:family="table-column">
      <style:table-column-properties style:column-width="4.7257in" style:rel-column-width="44177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10" style:family="table">
      <style:table-properties style:width="7.0104in" table:align="margins"/>
    </style:style>
    <style:style style:name="Table10.A" style:family="table-column">
      <style:table-column-properties style:column-width="1.7813in" style:rel-column-width="16651*"/>
    </style:style>
    <style:style style:name="Table10.B" style:family="table-column">
      <style:table-column-properties style:column-width="5.2292in" style:rel-column-width="48884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0104in" table:align="margins"/>
    </style:style>
    <style:style style:name="Table11.A" style:family="table-column">
      <style:table-column-properties style:column-width="7.0104in" style:rel-column-width="65535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479in"/>
    </style:style>
    <style:style style:name="Table7.B" style:family="table-column">
      <style:table-column-properties style:column-width="5.3986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549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479in"/>
    </style:style>
    <style:style style:name="Table7.B" style:family="table-column">
      <style:table-column-properties style:column-width="5.3986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549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1007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86in" style:rel-column-width="1366*"/>
    </style:style>
    <style:style style:name="Table3.B" style:family="table-column">
      <style:table-column-properties style:column-width="2.134in" style:rel-column-width="3073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0618in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86in" style:rel-column-width="1366*"/>
    </style:style>
    <style:style style:name="Table3.B" style:family="table-column">
      <style:table-column-properties style:column-width="2.134in" style:rel-column-width="3073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0618in"/>
    </style:style>
    <style:style style:name="P1" style:family="paragraph" style:parent-style-name="Text_20_body">
      <style:paragraph-properties fo:line-height="100%" fo:text-align="justify" style:justify-single-word="false"/>
      <style:text-properties officeooo:paragraph-rsid="00c32e6c"/>
    </style:style>
    <style:style style:name="P2" style:family="paragraph" style:parent-style-name="Text_20_body">
      <style:paragraph-properties fo:line-height="100%" fo:text-align="justify" style:justify-single-word="false"/>
      <style:text-properties officeooo:paragraph-rsid="00b697e5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c4f34e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ff2c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b47195" style:font-size-asian="12pt" style:font-size-complex="12pt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64a2d7" officeooo:paragraph-rsid="007554f1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f9681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line-height="100%"/>
      <style:text-properties style:font-name="Segoe UI" fo:font-size="10pt" fo:language="fr" fo:country="FR" fo:font-weight="bold" officeooo:rsid="00b90b20" officeooo:paragraph-rsid="00c32e6c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00%"/>
      <style:text-properties style:font-name="Segoe UI" fo:font-size="10pt" fo:language="fr" fo:country="FR" officeooo:rsid="003f18cf" officeooo:paragraph-rsid="00a85ce2" style:font-size-asian="18pt" style:font-size-complex="18pt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18" style:family="paragraph" style:parent-style-name="Text_20_body">
      <style:paragraph-properties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0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1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3" style:family="paragraph" style:parent-style-name="Table_20_Contents"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line-height="100%"/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line-height="100%"/>
      <style:text-properties fo:font-size="10pt" fo:font-weight="bold" officeooo:rsid="00a6066e" officeooo:paragraph-rsid="00a85ce2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fo:color="#000000" loext:opacity="100%" style:font-name="Segoe UI" fo:font-size="12pt" fo:language="en" fo:country="US" fo:font-style="normal" fo:font-weight="normal" officeooo:rsid="0049aaf3" officeooo:paragraph-rsid="00c32e6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paragraph-rsid="00c32e6c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5" style:family="paragraph" style:parent-style-name="Heading_20_1">
      <style:text-properties style:font-name="Segoe UI" fo:font-size="12pt" fo:language="fr" fo:country="FR" officeooo:rsid="00a99a37" officeooo:paragraph-rsid="00a99a37" style:font-size-asian="18pt" style:font-size-complex="18pt"/>
    </style:style>
    <style:style style:name="P36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37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38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39" style:family="paragraph" style:parent-style-name="Heading_20_1">
      <style:paragraph-properties fo:line-height="100%"/>
      <style:text-properties style:font-name="Segoe UI" fo:font-size="10pt" fo:language="fr" fo:country="FR" officeooo:rsid="003f18cf" officeooo:paragraph-rsid="00a2c4f6" style:font-size-asian="18pt" style:font-size-complex="18pt"/>
    </style:style>
    <style:style style:name="P40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ccc0db" style:font-size-asian="10pt" style:font-size-complex="10pt"/>
    </style:style>
    <style:style style:name="P41" style:family="paragraph" style:parent-style-name="Heading_20_2">
      <style:paragraph-properties fo:margin-top="0in" fo:margin-bottom="0in" style:contextual-spacing="false" fo:line-height="100%"/>
      <style:text-properties officeooo:paragraph-rsid="00ccc0db"/>
    </style:style>
    <style:style style:name="P42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ccc0db" style:font-size-asian="10pt" style:font-weight-asian="bold" style:font-size-complex="10pt" style:font-weight-complex="bold"/>
    </style:style>
    <style:style style:name="P43" style:family="paragraph" style:parent-style-name="Subtitle">
      <style:paragraph-properties fo:margin-top="0in" fo:margin-bottom="0.0008in" style:contextual-spacing="false"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44" style:family="paragraph" style:parent-style-name="Text_20_body" style:list-style-name="L1">
      <style:paragraph-properties fo:line-height="100%" fo:text-align="justify" style:justify-single-word="false"/>
      <style:text-properties style:font-name="Segoe UI" fo:font-size="10pt" fo:language="fr" fo:country="FR" officeooo:rsid="00b47195" officeooo:paragraph-rsid="00b47195" style:font-size-asian="12pt" style:font-size-complex="12pt"/>
    </style:style>
    <style:style style:name="P45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e73c3" style:font-size-asian="12pt" style:font-size-complex="12pt"/>
    </style:style>
    <style:style style:name="P46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f36f8" style:font-size-asian="12pt" style:font-size-complex="12pt"/>
    </style:style>
    <style:style style:name="P47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9f9681" style:font-size-asian="12pt" style:font-size-complex="12pt"/>
    </style:style>
    <style:style style:name="P48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5aa6b7" officeooo:paragraph-rsid="00be73c3" style:font-size-asian="12pt" style:font-size-complex="12pt"/>
    </style:style>
    <style:style style:name="P49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aeb01f" officeooo:paragraph-rsid="00bf36f8" style:font-size-asian="12pt" style:font-size-complex="12pt"/>
    </style:style>
    <style:style style:name="P50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51" style:family="paragraph" style:parent-style-name="Text_20_body">
      <style:paragraph-properties fo:line-height="100%"/>
      <style:text-properties style:font-name="Segoe UI" fo:font-size="10pt" fo:language="fr" fo:country="FR" fo:font-weight="bold" officeooo:rsid="00a0d1f3" officeooo:paragraph-rsid="00ddc08b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line-height="100%"/>
      <style:text-properties style:font-name="Segoe UI" fo:font-size="10pt" fo:language="fr" fo:country="FR" fo:font-weight="bold" officeooo:rsid="00a0d1f3" officeooo:paragraph-rsid="00a0d1f3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55" style:family="paragraph" style:parent-style-name="Text_20_body" style:list-style-name="L3">
      <style:paragraph-properties fo:line-height="100%" fo:text-align="justify" style:justify-single-word="false"/>
      <style:text-properties officeooo:paragraph-rsid="00c32e6c"/>
    </style:style>
    <style:style style:name="P56" style:family="paragraph" style:parent-style-name="Text_20_body" style:list-style-name="L4">
      <style:paragraph-properties fo:line-height="100%" fo:text-align="justify" style:justify-single-word="false"/>
      <style:text-properties officeooo:paragraph-rsid="00b697e5"/>
    </style:style>
    <style:style style:name="P57" style:family="paragraph" style:parent-style-name="Text_20_body" style:list-style-name="L5">
      <style:paragraph-properties fo:line-height="100%" fo:text-align="justify" style:justify-single-word="false"/>
      <style:text-properties officeooo:paragraph-rsid="00c4f34e"/>
    </style:style>
    <style:style style:name="P58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59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60" style:family="paragraph" style:parent-style-name="Text_20_body" style:list-style-name="L3">
      <style:paragraph-properties fo:line-height="100%" fo:text-align="justify" style:justify-single-word="false"/>
      <style:text-properties officeooo:rsid="00bae9d0" officeooo:paragraph-rsid="00c32e6c"/>
    </style:style>
    <style:style style:name="P61" style:family="paragraph" style:parent-style-name="Text_20_body" style:list-style-name="L3">
      <style:paragraph-properties fo:line-height="100%" fo:text-align="justify" style:justify-single-word="false"/>
      <style:text-properties officeooo:rsid="00aff2c1" officeooo:paragraph-rsid="00c32e6c"/>
    </style:style>
    <style:style style:name="P62" style:family="paragraph" style:parent-style-name="Text_20_body" style:list-style-name="L4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d4a3e3" officeooo:paragraph-rsid="00d4a3e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 style:list-style-name="L4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b5784b" officeooo:paragraph-rsid="00b5784b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margin-top="0in" fo:margin-bottom="0in" style:contextual-spacing="false" fo:line-height="100%"/>
      <style:text-properties fo:font-size="10pt" officeooo:paragraph-rsid="00ccc0db" style:font-size-asian="10pt" style:font-size-complex="10pt"/>
    </style:style>
    <style:style style:name="P65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ccc0db" style:font-size-asian="10pt" style:font-weight-asian="normal" style:font-size-complex="10pt" style:font-weight-complex="normal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9ed54c"/>
    </style:style>
    <style:style style:name="T7" style:family="text">
      <style:text-properties style:font-name="Segoe UI" fo:language="fr" fo:country="FR" style:text-underline-style="none" officeooo:rsid="00a0d1f3"/>
    </style:style>
    <style:style style:name="T8" style:family="text">
      <style:text-properties style:font-name="Segoe UI" fo:language="fr" fo:country="FR" style:text-underline-style="none" officeooo:rsid="00a99a37"/>
    </style:style>
    <style:style style:name="T9" style:family="text">
      <style:text-properties style:font-name="Segoe UI" fo:font-size="10pt" fo:language="fr" fo:country="FR" style:text-underline-style="none" style:font-size-asian="12pt" style:font-size-complex="12pt"/>
    </style:style>
    <style:style style:name="T10" style:family="text">
      <style:text-properties style:font-name="Segoe UI" fo:font-size="12pt" fo:language="fr" fo:country="FR" style:font-size-asian="18pt" style:font-size-complex="18pt"/>
    </style:style>
    <style:style style:name="T11" style:family="text">
      <style:text-properties style:font-name="Segoe UI" fo:font-size="12pt" fo:language="fr" fo:country="FR" officeooo:rsid="00a99a37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d250e" style:font-weight-asian="bold" style:font-weight-complex="bold"/>
    </style:style>
    <style:style style:name="T14" style:family="text">
      <style:text-properties fo:font-weight="bold" officeooo:rsid="003f18cf" style:font-weight-asian="bold" style:font-weight-complex="bold"/>
    </style:style>
    <style:style style:name="T15" style:family="text">
      <style:text-properties fo:font-weight="bold" officeooo:rsid="00718120" style:font-weight-asian="bold" style:font-weight-complex="bold"/>
    </style:style>
    <style:style style:name="T16" style:family="text">
      <style:text-properties fo:font-weight="bold" officeooo:rsid="002a7ede" style:font-weight-asian="bold" style:font-weight-complex="bold"/>
    </style:style>
    <style:style style:name="T17" style:family="text">
      <style:text-properties fo:font-weight="bold" officeooo:rsid="0035937d" style:font-weight-asian="bold" style:font-weight-complex="bold"/>
    </style:style>
    <style:style style:name="T18" style:family="text">
      <style:text-properties fo:color="#808080" loext:opacity="100%" fo:font-style="italic" style:font-style-asian="italic" style:font-style-complex="italic"/>
    </style:style>
    <style:style style:name="T19" style:family="text">
      <style:text-properties fo:color="#808080" loext:opacity="100%" fo:font-style="italic" officeooo:rsid="00525f52" style:font-style-asian="italic" style:font-style-complex="italic"/>
    </style:style>
    <style:style style:name="T20" style:family="text">
      <style:text-properties fo:color="#808080" loext:opacity="100%" fo:font-style="italic" officeooo:rsid="003d250e" style:font-style-asian="italic" style:font-style-complex="italic"/>
    </style:style>
    <style:style style:name="T21" style:family="text">
      <style:text-properties fo:color="#808080" loext:opacity="100%" fo:font-style="italic" officeooo:rsid="002a7ede" style:font-style-asian="italic" style:font-style-complex="italic"/>
    </style:style>
    <style:style style:name="T22" style:family="text">
      <style:text-properties fo:color="#808080" loext:opacity="100%" fo:font-style="italic" officeooo:rsid="00533f84" style:font-style-asian="italic" style:font-style-complex="italic"/>
    </style:style>
    <style:style style:name="T23" style:family="text">
      <style:text-properties fo:color="#808080" loext:opacity="100%" fo:font-style="italic" officeooo:rsid="00a0d1f3" style:font-style-asian="italic" style:font-style-complex="italic"/>
    </style:style>
    <style:style style:name="T24" style:family="text">
      <style:text-properties fo:color="#808080" loext:opacity="100%" fo:font-style="italic" style:font-size-asian="12pt" style:font-style-asian="italic" style:font-style-complex="italic"/>
    </style:style>
    <style:style style:name="T25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6" style:family="text">
      <style:text-properties fo:color="#808080" loext:opacity="100%" fo:font-style="italic" officeooo:rsid="009e179e" style:font-size-asian="12pt" style:font-style-asian="italic" style:font-style-complex="italic"/>
    </style:style>
    <style:style style:name="T27" style:family="text">
      <style:text-properties officeooo:rsid="003d250e"/>
    </style:style>
    <style:style style:name="T28" style:family="text">
      <style:text-properties officeooo:rsid="00718120"/>
    </style:style>
    <style:style style:name="T29" style:family="text">
      <style:text-properties officeooo:rsid="0043464b"/>
    </style:style>
    <style:style style:name="T30" style:family="text">
      <style:text-properties officeooo:rsid="005aa6b7"/>
    </style:style>
    <style:style style:name="T31" style:family="text">
      <style:text-properties officeooo:rsid="005d7836"/>
    </style:style>
    <style:style style:name="T32" style:family="text">
      <style:text-properties officeooo:rsid="006555ef"/>
    </style:style>
    <style:style style:name="T33" style:family="text">
      <style:text-properties officeooo:rsid="005b9277"/>
    </style:style>
    <style:style style:name="T34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style:font-name="Segoe UI" fo:font-size="10pt" fo:language="fr" fo:country="FR" fo:font-style="normal" fo:font-weight="normal" officeooo:rsid="00a2c4f6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loext:opacity="100%" style:font-name="Segoe UI" fo:font-size="10pt" fo:language="fr" fo:country="FR" fo:font-style="normal" fo:font-weight="normal" officeooo:rsid="009ce347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style:font-name="Segoe UI" fo:font-size="10pt" fo:language="fr" fo:country="FR" fo:font-style="normal" fo:font-weight="normal" officeooo:rsid="009f968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style:font-name="Segoe UI" fo:font-size="10pt" fo:language="fr" fo:country="FR" fo:font-style="normal" fo:font-weight="normal" officeooo:rsid="009758d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style:font-name="Segoe UI" fo:font-size="10pt" fo:language="fr" fo:country="FR" fo:font-style="normal" fo:font-weight="normal" officeooo:rsid="00b697e5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Segoe UI" fo:font-size="10pt" fo:language="fr" fo:country="FR" fo:font-style="normal" fo:font-weight="normal" officeooo:rsid="00c4f34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c74af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italic" fo:font-weight="bold" officeooo:rsid="0093a513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Segoe UI" fo:font-size="10pt" fo:language="fr" fo:country="FR" fo:font-style="italic" fo:font-weight="bold" officeooo:rsid="001f0c54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color="#000000" loext:opacity="100%" style:font-name="Segoe UI" fo:font-size="10pt" fo:language="fr" fo:country="FR" fo:font-style="italic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color="#000000" loext:opacity="100%" style:font-name="Segoe UI" fo:font-size="10pt" fo:language="fr" fo:country="FR" fo:font-style="italic" style:text-underline-style="none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fo:font-style="normal" fo:font-weight="normal" officeooo:rsid="009f9681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fo:font-size="10pt" fo:font-style="normal" fo:font-weight="normal" officeooo:rsid="00b056ed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ize="10pt" fo:font-style="normal" fo:font-weight="normal" officeooo:rsid="004cbd53" style:font-style-asian="normal" style:font-weight-asian="normal" style:font-style-complex="normal" style:font-weight-complex="normal"/>
    </style:style>
    <style:style style:name="T56" style:family="text">
      <style:text-properties officeooo:rsid="0064a2d7"/>
    </style:style>
    <style:style style:name="T57" style:family="text">
      <style:text-properties officeooo:rsid="002a7ede"/>
    </style:style>
    <style:style style:name="T58" style:family="text">
      <style:text-properties officeooo:rsid="00255948"/>
    </style:style>
    <style:style style:name="T59" style:family="text">
      <style:text-properties officeooo:rsid="005f9ab4"/>
    </style:style>
    <style:style style:name="T60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1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2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4" style:family="text">
      <style:text-properties fo:language="en" fo:country="US"/>
    </style:style>
    <style:style style:name="T65" style:family="text">
      <style:text-properties fo:language="en" fo:country="US" officeooo:rsid="00663d52"/>
    </style:style>
    <style:style style:name="T66" style:family="text">
      <style:text-properties fo:language="en" fo:country="US" officeooo:rsid="0099395a"/>
    </style:style>
    <style:style style:name="T67" style:family="text">
      <style:text-properties fo:language="en" fo:country="US" officeooo:rsid="009acbf1"/>
    </style:style>
    <style:style style:name="T68" style:family="text">
      <style:text-properties fo:language="en" fo:country="US" officeooo:rsid="00a37664"/>
    </style:style>
    <style:style style:name="T69" style:family="text">
      <style:text-properties fo:language="en" fo:country="US" officeooo:rsid="00a40746"/>
    </style:style>
    <style:style style:name="T70" style:family="text">
      <style:text-properties fo:language="en" fo:country="US" officeooo:rsid="00a4545d"/>
    </style:style>
    <style:style style:name="T71" style:family="text">
      <style:text-properties fo:language="en" fo:country="US" officeooo:rsid="00a6066e"/>
    </style:style>
    <style:style style:name="T72" style:family="text">
      <style:text-properties fo:language="en" fo:country="US" officeooo:rsid="00a769c1"/>
    </style:style>
    <style:style style:name="T73" style:family="text">
      <style:text-properties fo:language="en" fo:country="US" officeooo:rsid="00cbcbf0"/>
    </style:style>
    <style:style style:name="T74" style:family="text">
      <style:text-properties fo:language="en" fo:country="US" officeooo:rsid="00d7bd85"/>
    </style:style>
    <style:style style:name="T75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6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7" style:family="text">
      <style:text-properties officeooo:rsid="0086e331"/>
    </style:style>
    <style:style style:name="T78" style:family="text">
      <style:text-properties officeooo:rsid="00876097"/>
    </style:style>
    <style:style style:name="T79" style:family="text">
      <style:text-properties officeooo:rsid="00946146"/>
    </style:style>
    <style:style style:name="T80" style:family="text">
      <style:text-properties officeooo:rsid="009d1a10"/>
    </style:style>
    <style:style style:name="T81" style:family="text">
      <style:text-properties officeooo:rsid="009ed54c"/>
    </style:style>
    <style:style style:name="T82" style:family="text">
      <style:text-properties officeooo:rsid="009f3051"/>
    </style:style>
    <style:style style:name="T83" style:family="text">
      <style:text-properties officeooo:rsid="009f9681"/>
    </style:style>
    <style:style style:name="T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0673add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3d250e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officeooo:rsid="00a08645" style:font-style-asian="italic" style:font-weight-asian="bold" style:font-style-complex="italic" style:font-weight-complex="bold"/>
    </style:style>
    <style:style style:name="T88" style:family="text">
      <style:text-properties fo:font-style="italic" fo:font-weight="bold" officeooo:rsid="00b2f231" style:font-style-asian="italic" style:font-weight-asian="bold" style:font-style-complex="italic" style:font-weight-complex="bold"/>
    </style:style>
    <style:style style:name="T89" style:family="text">
      <style:text-properties officeooo:rsid="00a08645"/>
    </style:style>
    <style:style style:name="T90" style:family="text">
      <style:text-properties officeooo:rsid="00a0d1f3"/>
    </style:style>
    <style:style style:name="T91" style:family="text">
      <style:text-properties officeooo:rsid="00a37664"/>
    </style:style>
    <style:style style:name="T92" style:family="text">
      <style:text-properties officeooo:rsid="00aff2c1"/>
    </style:style>
    <style:style style:name="T93" style:family="text">
      <style:text-properties officeooo:rsid="00b47195"/>
    </style:style>
    <style:style style:name="T94" style:family="text">
      <style:text-properties officeooo:rsid="00bc86b0"/>
    </style:style>
    <style:style style:name="T95" style:family="text">
      <style:text-properties officeooo:rsid="00bcac9d"/>
    </style:style>
    <style:style style:name="T96" style:family="text">
      <style:text-properties officeooo:rsid="00be73c3"/>
    </style:style>
    <style:style style:name="T97" style:family="text">
      <style:text-properties officeooo:rsid="00bf7aa3"/>
    </style:style>
    <style:style style:name="T98" style:family="text">
      <style:text-properties officeooo:rsid="00c0859a"/>
    </style:style>
    <style:style style:name="T99" style:family="text">
      <style:text-properties officeooo:rsid="00cbcbf0"/>
    </style:style>
    <style:style style:name="T100" style:family="text">
      <style:text-properties officeooo:rsid="00d128f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St<text:span text:style-name="T1">é</text:span>fan OUMANSOUR</text:p>
            <text:p text:style-name="P43">Développeur <text:span text:style-name="T80">de </text:span><text:span text:style-name="T81">moteur de rendu </text:span><text:span text:style-name="T82">3D</text:span></text:p>
            <text:p text:style-name="P53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50">Lyon, France</text:p>
                  <text:p text:style-name="P50"><text:span text:style-name="T2">+33 </text:span>6 95 64 26 91</text:p>
                  <text:p text:style-name="P58"><text:a xlink:type="simple" xlink:href="mailto:oumansour.stefan@gmail.com" text:style-name="Internet_20_link" text:visited-style-name="Visited_20_Internet_20_Link"><text:span text:style-name="T9">oumansour.stefan@gmail.com</text:span></text:a></text:p>
                </table:table-cell>
                <table:table-cell table:style-name="Table1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h text:style-name="P40" text:outline-level="2" text:is-list-header="true">GitHub :</text:h>
                      </table:table-cell>
                      <table:table-cell table:style-name="Table3.A1" office:value-type="string">
                        <text:h text:style-name="P41" text:outline-level="2" text:is-list-header="true"><text:a xlink:type="simple" xlink:href="https://github.com/ostef" text:style-name="Internet_20_link" text:visited-style-name="Visited_20_Internet_20_Link"><text:span text:style-name="T60">https://</text:span><text:span text:style-name="T61">github.com/</text:span><text:span text:style-name="T62">ostef</text:span></text:a></text:h>
                      </table:table-cell>
                    </table:table-row>
                    <table:table-row>
                      <table:table-cell table:style-name="Table3.A1" office:value-type="string">
                        <text:h text:style-name="P42" text:outline-level="2" text:is-list-header="true">Portfolio :</text:h>
                      </table:table-cell>
                      <table:table-cell table:style-name="Table3.A1" office:value-type="string">
                        <text:h text:style-name="P41" text:outline-level="2" text:is-list-header="true"><text:a xlink:type="simple" xlink:href="https://ostef.github.io/" text:style-name="Internet_20_link" text:visited-style-name="Visited_20_Internet_20_Link"><text:span text:style-name="T60">https://</text:span><text:span text:style-name="T63">ostef.github.io</text:span></text:a></text:h>
                      </table:table-cell>
                    </table:table-row>
                    <table:table-row table:style-name="Table3.3">
                      <table:table-cell table:style-name="Table3.A1" office:value-type="string">
                        <text:p text:style-name="P64"><text:span text:style-name="T75">L</text:span><text:span text:style-name="T76">inkedin :</text:span></text:p>
                      </table:table-cell>
                      <table:table-cell table:style-name="Table3.A1" office:value-type="string">
                        <text:p text:style-name="P65">@oumansour-stefan</text:p>
                      </table:table-cell>
                    </table:table-row>
                  </table:table>
                </table:table-cell>
              </table:table-row>
            </table:table>
            <text:p text:style-name="P59"/>
          </table:table-cell>
        </table:table-row>
      </table:table>
      <text:p text:style-name="P54"/>
      <text:p text:style-name="P22"><text:span text:style-name="T3">Je suis un développeur passionné </text:span><text:span text:style-name="T4">et </text:span><text:span text:style-name="T5">rigoureux </text:span><text:span text:style-name="T6">spécialisé en programmation de moteur de rendu 3D et en architecture bas niveau. J’ai </text:span><text:span text:style-name="T7">beaucoup de projets personnels à mon actif ainsi qu’</text:span><text:span text:style-name="T8">une expérience professionnelle d’un an et demi dans un petit studio de jeu vidéo en tant que développeur moteur.</text:span></text:p>
      <text:h text:style-name="P35" text:outline-level="1" text:is-list-header="true">COMPÉTENCES<text:span text:style-name="T11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3">Langages :</text:p>
          </table:table-cell>
          <table:table-cell table:style-name="Table13.A1" office:value-type="string">
            <text:p text:style-name="P18">C++, C#, <text:span text:style-name="T58">C</text:span><text:span text:style-name="T59">, </text:span><text:span text:style-name="T56">x86 Assembly</text:span>, <text:span text:style-name="T91">GLSL, HLSL, </text:span>Python, Typescript, Javascript,</text:p>
          </table:table-cell>
        </table:table-row>
        <table:table-row table:style-name="Table13.2">
          <table:table-cell table:style-name="Table13.A1" office:value-type="string">
            <text:p text:style-name="P23">Technologies :</text:p>
          </table:table-cell>
          <table:table-cell table:style-name="Table13.A1" office:value-type="string">
            <text:p text:style-name="P18"><text:span text:style-name="T65">Vulkan, DirectX </text:span><text:span text:style-name="T69">11, DirectX 12</text:span><text:span text:style-name="T65">, Metal, </text:span><text:span text:style-name="T70">OpenGL</text:span><text:span text:style-name="T65">, </text:span><text:span text:style-name="T64">Unity, Unreal, Git, </text:span><text:span text:style-name="T68">Linux</text:span></text:p>
          </table:table-cell>
        </table:table-row>
        <table:table-row>
          <table:table-cell table:style-name="Table13.A1" office:value-type="string">
            <text:p text:style-name="P25">Domaines :</text:p>
          </table:table-cell>
          <table:table-cell table:style-name="Table13.A1" office:value-type="string">
            <text:p text:style-name="P17"><text:span text:style-name="T71">Moteurs de rendus, </text:span><text:span text:style-name="T74">Langages de programmation, </text:span><text:span text:style-name="T73">Fullstack, </text:span><text:span text:style-name="T72">M</text:span><text:span text:style-name="T66">aths, </text:span><text:span text:style-name="T67">Multithreading, </text:span><text:span text:style-name="T74">Programmation bas niveau, </text:span><text:span text:style-name="T67">Programmation temps réel</text:span></text:p>
          </table:table-cell>
        </table:table-row>
        <table:table-row table:style-name="Table13.4">
          <table:table-cell table:style-name="Table13.A1" office:value-type="string">
            <text:p text:style-name="P24">Langues :</text:p>
          </table:table-cell>
          <table:table-cell table:style-name="Table13.A1" office:value-type="string">
            <text:p text:style-name="P16">Français, Anglais</text:p>
          </table:table-cell>
        </table:table-row>
      </table:table>
      <text:h text:style-name="P36" text:outline-level="1" text:is-list-header="true">EXPÉRIENCES PROFESSIONNELLE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2">Freelancing</text:p>
          </table:table-cell>
          <table:table-cell table:style-name="Table2.A1" office:value-type="string">
            <text:p text:style-name="P4"><text:span text:style-name="T23">Janvier 2026 </text:span><text:span text:style-name="T18">– </text:span><text:span text:style-name="T23">présent</text:span></text:p>
          </table:table-cell>
        </table:table-row>
      </table:table>
      <text:p text:style-name="P9"><text:span text:style-name="T90">Missions freelance dans le web (</text:span><text:span text:style-name="T99">fullstack </text:span><text:span text:style-name="T90">VueJS, NestJS, 3D ThreeJS, PHP Symfon</text:span><text:span text:style-name="T92">y</text:span><text:span text:style-name="T90">)</text:span></text:p>
      <text:p text:style-name="P8"><text:span text:style-name="T10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<text:span text:style-name="T13">Développeur </text:span><text:span text:style-name="T14">de </text:span><text:span text:style-name="T15">moteur de </text:span><text:span text:style-name="T14">jeu vidéo</text:span><text:span text:style-name="T13">,</text:span><text:span text:style-name="T16"> </text:span><text:span text:style-name="T12">Fomenko</text:span></text:p>
          </table:table-cell>
          <table:table-cell table:style-name="Table6.A1" office:value-type="string">
            <text:p text:style-name="P5"><text:span text:style-name="T19">M</text:span><text:span text:style-name="T20">ars</text:span><text:span text:style-name="T21"> </text:span><text:span text:style-name="T18">2024 – </text:span><text:span text:style-name="T22">J</text:span><text:span text:style-name="T20">uillet</text:span><text:span text:style-name="T21"> </text:span><text:span text:style-name="T18">2025</text:span></text:p>
          </table:table-cell>
        </table:table-row>
      </table:table>
      <text:p text:style-name="P10"><text:span text:style-name="T27">Développement d’un </text:span><text:span text:style-name="T28">moteur de </text:span><text:span text:style-name="T27">jeu vidéo, moteur de rendu et </text:span><text:span text:style-name="T29">é</text:span><text:span text:style-name="T27">diteur en </text:span><text:span text:style-name="T85">C++</text:span><text:span text:style-name="T27">, </text:span><text:span text:style-name="T88">DirectX</text:span><text:span text:style-name="T27"> et </text:span><text:span text:style-name="T86">Metal</text:span><text:span text:style-name="T27"> chez Fomenko </text:span><text:span text:style-name="T100">pour un jeu d’aventure/énigmes</text:span><text:span text:style-name="T27">:</text:span></text:p>
      <text:list text:style-name="L1">
        <text:list-item>
          <text:p text:style-name="P44">Moteur de rendu PBR, shadow maps, SSAO, API d’abstraction graphique</text:p>
        </text:list-item>
        <text:list-item>
          <text:p text:style-name="P44">Framework d’interface graphique</text:p>
        </text:list-item>
        <text:list-item>
          <text:p text:style-name="P44">Editeur de monde et placement d’objets</text:p>
        </text:list-item>
        <text:list-item>
          <text:p text:style-name="P44">Outils de painting de terrain et de végétation</text:p>
        </text:list-item>
      </text:list>
      <text:h text:style-name="P38" text:outline-level="1" text:is-list-header="true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"><text:span text:style-name="T78">Vk-Engine, m</text:span><text:span text:style-name="T77">oteur de jeu</text:span></text:p>
          </table:table-cell>
          <table:table-cell table:style-name="Table9.A1" office:value-type="string">
            <text:p text:style-name="P31">202<text:span text:style-name="T30">4 - </text:span><text:span text:style-name="T31">présent</text:span></text:p>
          </table:table-cell>
        </table:table-row>
      </table:table>
      <text:p text:style-name="P12">Moteur de jeu <text:span text:style-name="T32">avec un moteur de rendu </text:span>en <text:span text:style-name="T87">C++</text:span><text:span text:style-name="T89"> et </text:span><text:span text:style-name="T84">Vulkan</text:span><text:span text:style-name="T33">, </text:span><text:span text:style-name="T32">un</text:span><text:span text:style-name="T33"> </text:span>système d’entité<text:span text:style-name="T33">s</text:span>, <text:span text:style-name="T32">un </text:span>système d’assets, <text:span text:style-name="T79">un éditeur et un moteur physique :</text:span></text:p>
      <text:list text:style-name="L2">
        <text:list-item>
          <text:p text:style-name="P45">Moteur de rendu forward clustered,</text:p>
        </text:list-item>
        <text:list-item>
          <text:p text:style-name="P48"><text:span text:style-name="T96">M</text:span><text:span text:style-name="T83">atériaux PBR, </text:span><text:span text:style-name="T98">image based lighting</text:span><text:span text:style-name="T83">, bloom, parallax occlusion mapping, </text:span><text:span text:style-name="T93">shadow maps, </text:span><text:span text:style-name="T97">skybox HDR</text:span></text:p>
        </text:list-item>
        <text:list-item>
          <text:p text:style-name="P49">Animations squelettales</text:p>
        </text:list-item>
        <text:list-item>
          <text:p text:style-name="P46">Système d’entités et de composants performant</text:p>
        </text:list-item>
        <text:list-item>
          <text:p text:style-name="P47">Editeur ImGui complet : multi-viewport, gestion de scènes, <text:span text:style-name="T94">éditeur de matériaux</text:span></text:p>
        </text:list-item>
        <text:list-item>
          <text:p text:style-name="P47">Intégration <text:span text:style-name="T95">avec le </text:span>moteur physique Jolt</text:p>
        </text:list-item>
      </text:list>
      <text:p text:style-name="P2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Minecraft clone</text:p>
          </table:table-cell>
          <table:table-cell table:style-name="Table4.A1" office:value-type="string">
            <text:p text:style-name="P32">2023</text:p>
          </table:table-cell>
        </table:table-row>
      </table:table>
      <text:p text:style-name="P1"><text:span text:style-name="T35">Recréation du jeu vidéo </text:span><text:span text:style-name="T36">Minecraft </text:span><text:span text:style-name="T35">en </text:span><text:span text:style-name="T48">C++</text:span><text:span text:style-name="T37"> </text:span><text:span text:style-name="T35">avec </text:span><text:span text:style-name="T49">OpenGL </text:span><text:span text:style-name="T36">:</text:span></text:p>
      <text:list text:style-name="L3">
        <text:list-item>
          <text:p text:style-name="P55"><text:span text:style-name="T41">G</text:span><text:span text:style-name="T38">énération de terrain basée sur le même fonctionneme</text:span><text:span text:style-name="T39">nt que le </text:span><text:span text:style-name="T38">jeu original</text:span></text:p>
        </text:list-item>
        <text:list-item>
          <text:p text:style-name="P60"><text:span text:style-name="T38">R</text:span><text:span text:style-name="T34">endus de chunks, gestion de la transparence, animations</text:span></text:p>
        </text:list-item>
        <text:list-item>
          <text:p text:style-name="P61"><text:span text:style-name="T38">C</text:span><text:span text:style-name="T34">ollisions avec le terrain</text:span></text:p>
        </text:list-item>
        <text:list-item>
          <text:p text:style-name="P55"><text:span text:style-name="T54">Editeur </text:span><text:span text:style-name="T55">avec la librairie ImGui</text:span></text:p>
        </text:list-item>
      </text:list>
      <text:p text:style-name="P1"><text:soft-page-break/><text:span text:style-name="T55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Langage de programmation</text:p>
          </table:table-cell>
          <table:table-cell table:style-name="Table8.A1" office:value-type="string">
            <text:p text:style-name="P33">2024 - présent</text:p>
          </table:table-cell>
        </table:table-row>
      </table:table>
      <text:p text:style-name="P11"><text:span text:style-name="T52">Développement d’un langage de programmation </text:span><text:span text:style-name="T53">bas niveau :</text:span></text:p>
      <text:list text:style-name="L4">
        <text:list-item>
          <text:p text:style-name="P62">Compilation vers un bytecode custom</text:p>
        </text:list-item>
        <text:list-item>
          <text:p text:style-name="P63">Typage statique</text:p>
        </text:list-item>
        <text:list-item>
          <text:p text:style-name="P63">Structs, pointeurs, tableaux, fonctions avec overloading</text:p>
        </text:list-item>
        <text:list-item>
          <text:p text:style-name="P63">Appels dynamiques à des librairies C</text:p>
        </text:list-item>
        <text:list-item>
          <text:p text:style-name="P56"><text:span text:style-name="T45">Exécution d</text:span><text:span text:style-name="T47">e code </text:span><text:span text:style-name="T45">arbitraire au compile time</text:span></text:p>
        </text:list-item>
      </text:list>
      <text:p text:style-name="P2"><text:span text:style-name="T40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0">Jeu de pong en ligne</text:p>
          </table:table-cell>
          <table:table-cell table:style-name="Table10.A1" office:value-type="string">
            <text:p text:style-name="P34">2023</text:p>
          </table:table-cell>
        </table:table-row>
      </table:table>
      <text:p text:style-name="P3"><text:span text:style-name="T42">Application web full-stack en </text:span><text:span text:style-name="T51">Typescript</text:span><text:span text:style-name="T42"> avec </text:span><text:span text:style-name="T50">VueJS</text:span><text:span text:style-name="T42"> et </text:span><text:span text:style-name="T50">NestJS </text:span><text:span text:style-name="T42">:</text:span></text:p>
      <text:list text:style-name="L5">
        <text:list-item>
          <text:p text:style-name="P57"><text:span text:style-name="T43">Implémentation </text:span><text:span text:style-name="T42">d’un système d’authentification 2FA,</text:span></text:p>
        </text:list-item>
        <text:list-item>
          <text:p text:style-name="P57"><text:span text:style-name="T46">C</text:span><text:span text:style-name="T42">hat en temps réel </text:span><text:span text:style-name="T46">avec channels et admins</text:span></text:p>
        </text:list-item>
        <text:list-item>
          <text:p text:style-name="P57"><text:span text:style-name="T46">J</text:span><text:span text:style-name="T44">eu de pong </text:span><text:span text:style-name="T42">basé sur Websockets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37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6"><text:span text:style-name="T14">École 42 </text:span><text:span text:style-name="T16">Lyon, </text:span><text:span text:style-name="T17">France</text:span></text:p>
                </table:table-cell>
                <table:table-cell table:style-name="Table7.A1" office:value-type="string">
                  <text:p text:style-name="P19"><text:span text:style-name="T57"><text:s/></text:span><text:span text:style-name="T24">2021 - </text:span><text:span text:style-name="T26">2026</text:span></text:p>
                </table:table-cell>
              </table:table-row>
            </table:table>
            <text:p text:style-name="P28">Expert en architecture informatique</text:p>
            <text:p text:style-name="P26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29"><text:span text:style-name="T17">L</text:span><text:span text:style-name="T12">ycée Colbert, Tourcoing, France</text:span></text:p>
                </table:table-cell>
                <table:table-cell table:style-name="Table1.A1" office:value-type="string">
                  <text:p text:style-name="P19"><text:span text:style-name="T57"><text:s/></text:span><text:span text:style-name="T24">2</text:span><text:span text:style-name="T25">018 - 2020</text:span></text:p>
                </table:table-cell>
              </table:table-row>
            </table:table>
            <text:p text:style-name="P30">Bac S option Sciences de l’Ingénieur</text:p>
          </table:table-cell>
        </table:table-row>
      </table:table>
      <text:h text:style-name="P39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6098in" fo:margin-right="0.6098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6-09T00:41:52.377271692</dc:date>
    <meta:editing-duration>PT11H7M1S</meta:editing-duration>
    <meta:editing-cycles>176</meta:editing-cycles>
    <meta:generator>LibreOffice/24.2.7.2$Linux_X86_64 LibreOffice_project/420$Build-2</meta:generator>
    <meta:print-date>2026-06-09T00:33:16.405382415</meta:print-date>
    <meta:printed-by>PDF files</meta:printed-by>
    <meta:document-statistic meta:table-count="13" meta:image-count="0" meta:object-count="0" meta:page-count="2" meta:paragraph-count="70" meta:word-count="439" meta:character-count="2786" meta:non-whitespace-character-count="2435"/>
  </office:meta>
</office:document-meta>
</file>