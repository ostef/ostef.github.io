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65535*"/>
    </style:style>
    <style:style style:name="Table5.1" style:family="table-row">
      <style:table-row-properties style:min-row-height="1.2882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1535in" style:rel-column-width="10782*"/>
    </style:style>
    <style:style style:name="Table2.B" style:family="table-column">
      <style:table-column-properties style:column-width="5.8569in" style:rel-column-width="54753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3.525in" style:rel-column-width="32952*"/>
    </style:style>
    <style:style style:name="Table6.B" style:family="table-column">
      <style:table-column-properties style:column-width="3.4854in" style:rel-column-width="32583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2.0944in" style:rel-column-width="19579*"/>
    </style:style>
    <style:style style:name="Table9.B" style:family="table-column">
      <style:table-column-properties style:column-width="4.916in" style:rel-column-width="45956*"/>
    </style:style>
    <style:style style:name="Table9.1" style:family="table-row">
      <style:table-row-properties style:min-row-height="0.1569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4111in" style:rel-column-width="13191*"/>
    </style:style>
    <style:style style:name="Table4.B" style:family="table-column">
      <style:table-column-properties style:column-width="5.5993in" style:rel-column-width="52344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2.2847in" style:rel-column-width="21358*"/>
    </style:style>
    <style:style style:name="Table8.B" style:family="table-column">
      <style:table-column-properties style:column-width="4.7257in" style:rel-column-width="44177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7813in" style:rel-column-width="16651*"/>
    </style:style>
    <style:style style:name="Table10.B" style:family="table-column">
      <style:table-column-properties style:column-width="5.2292in" style:rel-column-width="48884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2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4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5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3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4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8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3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39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42" style:family="paragraph" style:parent-style-name="Subtitle">
      <style:paragraph-properties fo:margin-top="0in" fo:margin-bottom="0.0008in" style:contextual-spacing="false" fo:line-height="100%" fo:text-align="start" style:justify-single-word="false"/>
      <style:text-properties style:font-name="Segoe UI" fo:font-size="14pt" fo:language="fr" fo:country="FR" officeooo:rsid="00e135ca" officeooo:paragraph-rsid="00e135ca" style:font-size-asian="18pt" style:font-size-complex="18pt"/>
    </style:style>
    <style:style style:name="P43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44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5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51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54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55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57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e135ca" style:font-size-asian="12pt" style:font-size-complex="12pt"/>
    </style:style>
    <style:style style:name="P58" style:family="paragraph" style:parent-style-name="Text_20_body" style:list-style-name="L6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dce9" officeooo:paragraph-rsid="00e135c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dce9" officeooo:paragraph-rsid="00e135ca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61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62" style:family="paragraph" style:parent-style-name="Text_20_body" style:list-style-name="L5">
      <style:paragraph-properties fo:line-height="100%" fo:text-align="justify" style:justify-single-word="false"/>
      <style:text-properties officeooo:paragraph-rsid="00df408d"/>
    </style:style>
    <style:style style:name="P63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4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5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d4a3e3" officeooo:paragraph-rsid="00d4a3e3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 style:list-style-name="L5">
      <style:paragraph-properties fo:line-height="100%" fo:text-align="justify" style:justify-single-word="false"/>
      <style:text-properties officeooo:rsid="00e093ef" officeooo:paragraph-rsid="00df408d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9ed54c"/>
    </style:style>
    <style:style style:name="T7" style:family="text">
      <style:text-properties style:font-name="Segoe UI" fo:language="fr" fo:country="FR" style:text-underline-style="none" officeooo:rsid="00a0d1f3"/>
    </style:style>
    <style:style style:name="T8" style:family="text">
      <style:text-properties style:font-name="Segoe UI" fo:language="fr" fo:country="FR" style:text-underline-style="none" officeooo:rsid="00a99a37"/>
    </style:style>
    <style:style style:name="T9" style:family="text">
      <style:text-properties style:font-name="Segoe UI" fo:language="fr" fo:country="FR" style:text-underline-style="none" officeooo:rsid="00e0a828"/>
    </style:style>
    <style:style style:name="T10" style:family="text">
      <style:text-properties style:font-name="Segoe UI" fo:language="fr" fo:country="FR" style:text-underline-style="none" officeooo:rsid="00e135ca"/>
    </style:style>
    <style:style style:name="T11" style:family="text">
      <style:text-properties style:font-name="Segoe UI" fo:font-size="10pt" fo:language="fr" fo:country="FR" style:text-underline-style="none" style:font-size-asian="12pt" style:font-size-complex="12pt"/>
    </style:style>
    <style:style style:name="T12" style:family="text">
      <style:text-properties style:font-name="Segoe UI" fo:font-size="10pt" fo:language="fr" fo:country="FR" fo:font-style="normal" fo:font-weight="normal" officeooo:rsid="00e3144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Segoe UI" fo:font-size="12pt" fo:language="fr" fo:country="FR" style:font-size-asian="18pt" style:font-size-complex="18pt"/>
    </style:style>
    <style:style style:name="T14" style:family="text">
      <style:text-properties style:font-name="Segoe UI" fo:font-size="12pt" fo:language="fr" fo:country="FR" officeooo:rsid="00a99a37" style:font-size-asian="18pt" style:font-size-complex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officeooo:rsid="00a0d1f3" style:font-style-asian="italic" style:font-style-complex="italic"/>
    </style:style>
    <style:style style:name="T27" style:family="text">
      <style:text-properties fo:color="#808080" loext:opacity="100%" fo:font-style="italic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30" style:family="text">
      <style:text-properties fo:color="#808080" loext:opacity="100%" fo:font-style="italic" officeooo:rsid="00e129a5" style:font-size-asian="12pt" style:font-style-asian="italic" style:font-style-complex="italic"/>
    </style:style>
    <style:style style:name="T31" style:family="text">
      <style:text-properties officeooo:rsid="003d250e"/>
    </style:style>
    <style:style style:name="T32" style:family="text">
      <style:text-properties officeooo:rsid="00718120"/>
    </style:style>
    <style:style style:name="T33" style:family="text">
      <style:text-properties officeooo:rsid="0043464b"/>
    </style:style>
    <style:style style:name="T34" style:family="text">
      <style:text-properties officeooo:rsid="005aa6b7"/>
    </style:style>
    <style:style style:name="T35" style:family="text">
      <style:text-properties officeooo:rsid="005d7836"/>
    </style:style>
    <style:style style:name="T36" style:family="text">
      <style:text-properties officeooo:rsid="006555ef"/>
    </style:style>
    <style:style style:name="T37" style:family="text">
      <style:text-properties officeooo:rsid="005b9277"/>
    </style:style>
    <style:style style:name="T38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e093ef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9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61" style:family="text">
      <style:text-properties officeooo:rsid="0064a2d7"/>
    </style:style>
    <style:style style:name="T62" style:family="text">
      <style:text-properties officeooo:rsid="002a7ede"/>
    </style:style>
    <style:style style:name="T63" style:family="text">
      <style:text-properties officeooo:rsid="00255948"/>
    </style:style>
    <style:style style:name="T64" style:family="text">
      <style:text-properties officeooo:rsid="005f9ab4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7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8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663d52"/>
    </style:style>
    <style:style style:name="T71" style:family="text">
      <style:text-properties fo:language="en" fo:country="US" officeooo:rsid="0099395a"/>
    </style:style>
    <style:style style:name="T72" style:family="text">
      <style:text-properties fo:language="en" fo:country="US" officeooo:rsid="009acbf1"/>
    </style:style>
    <style:style style:name="T73" style:family="text">
      <style:text-properties fo:language="en" fo:country="US" officeooo:rsid="00a37664"/>
    </style:style>
    <style:style style:name="T74" style:family="text">
      <style:text-properties fo:language="en" fo:country="US" officeooo:rsid="00a40746"/>
    </style:style>
    <style:style style:name="T75" style:family="text">
      <style:text-properties fo:language="en" fo:country="US" officeooo:rsid="00a4545d"/>
    </style:style>
    <style:style style:name="T76" style:family="text">
      <style:text-properties fo:language="en" fo:country="US" officeooo:rsid="00a6066e"/>
    </style:style>
    <style:style style:name="T77" style:family="text">
      <style:text-properties fo:language="en" fo:country="US" officeooo:rsid="00a769c1"/>
    </style:style>
    <style:style style:name="T78" style:family="text">
      <style:text-properties fo:language="en" fo:country="US" officeooo:rsid="00cbcbf0"/>
    </style:style>
    <style:style style:name="T79" style:family="text">
      <style:text-properties fo:language="en" fo:country="US" officeooo:rsid="00d7bd85"/>
    </style:style>
    <style:style style:name="T80" style:family="text">
      <style:text-properties fo:language="en" fo:country="US" officeooo:rsid="00e0a828"/>
    </style:style>
    <style:style style:name="T8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8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83" style:family="text">
      <style:text-properties officeooo:rsid="0086e331"/>
    </style:style>
    <style:style style:name="T84" style:family="text">
      <style:text-properties officeooo:rsid="00876097"/>
    </style:style>
    <style:style style:name="T85" style:family="text">
      <style:text-properties officeooo:rsid="00946146"/>
    </style:style>
    <style:style style:name="T86" style:family="text">
      <style:text-properties officeooo:rsid="009f9681"/>
    </style:style>
    <style:style style:name="T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92" style:family="text">
      <style:text-properties officeooo:rsid="00a08645"/>
    </style:style>
    <style:style style:name="T93" style:family="text">
      <style:text-properties officeooo:rsid="00a0d1f3"/>
    </style:style>
    <style:style style:name="T94" style:family="text">
      <style:text-properties officeooo:rsid="00a37664"/>
    </style:style>
    <style:style style:name="T95" style:family="text">
      <style:text-properties officeooo:rsid="00aff2c1"/>
    </style:style>
    <style:style style:name="T96" style:family="text">
      <style:text-properties officeooo:rsid="00b47195"/>
    </style:style>
    <style:style style:name="T97" style:family="text">
      <style:text-properties officeooo:rsid="00bc86b0"/>
    </style:style>
    <style:style style:name="T98" style:family="text">
      <style:text-properties officeooo:rsid="00bcac9d"/>
    </style:style>
    <style:style style:name="T99" style:family="text">
      <style:text-properties officeooo:rsid="00be73c3"/>
    </style:style>
    <style:style style:name="T100" style:family="text">
      <style:text-properties officeooo:rsid="00bf7aa3"/>
    </style:style>
    <style:style style:name="T101" style:family="text">
      <style:text-properties officeooo:rsid="00c0859a"/>
    </style:style>
    <style:style style:name="T102" style:family="text">
      <style:text-properties officeooo:rsid="00cbcbf0"/>
    </style:style>
    <style:style style:name="T103" style:family="text">
      <style:text-properties officeooo:rsid="00d128f8"/>
    </style:style>
    <style:style style:name="T104" style:family="text">
      <style:text-properties fo:font-size="10pt" fo:language="fr" fo:country="FR"/>
    </style:style>
    <style:style style:name="T105" style:family="text">
      <style:text-properties fo:font-size="10pt" fo:language="fr" fo:country="FR" officeooo:rsid="009ce347"/>
    </style:style>
    <style:style style:name="T106" style:family="text">
      <style:text-properties officeooo:rsid="00e135ca"/>
    </style:style>
    <style:style style:name="T107" style:family="text">
      <style:text-properties officeooo:rsid="00e48b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St<text:span text:style-name="T1">é</text:span>fan OUMANSOUR</text:p>
            <text:p text:style-name="P42">Développeur de moteurs de rendu 3D</text:p>
            <text:p text:style-name="P26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4"><text:a xlink:type="simple" xlink:href="mailto:oumansour.stefan@gmail.com" text:style-name="Internet_20_link" text:visited-style-name="Visited_20_Internet_20_Link"><text:span text:style-name="T11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48" text:outline-level="2" text:is-list-header="true">GitHub :</text:h>
                      </table:table-cell>
                      <table:table-cell table:style-name="Table3.A1" office:value-type="string">
      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5">https://</text:span><text:span text:style-name="T66">github.com/</text:span><text:span text:style-name="T67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50" text:outline-level="2" text:is-list-header="true">Portfolio :</text:h>
                      </table:table-cell>
                      <table:table-cell table:style-name="Table3.A1" office:value-type="string">
      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5">https://</text:span><text:span text:style-name="T68">ostef.github.io</text:span></text:a></text:h>
                      </table:table-cell>
                    </table:table-row>
                    <table:table-row table:style-name="Table3.3">
                      <table:table-cell table:style-name="Table3.A1" office:value-type="string">
                        <text:p text:style-name="P31"><text:span text:style-name="T81">L</text:span><text:span text:style-name="T82">inkedin :</text:span></text:p>
                      </table:table-cell>
                      <table:table-cell table:style-name="Table3.A1" office:value-type="string">
                        <text:p text:style-name="P41">@oumansour-stefan</text:p>
                      </table:table-cell>
                    </table:table-row>
                  </table:table>
                </table:table-cell>
              </table:table-row>
            </table:table>
            <text:p text:style-name="P5"/>
          </table:table-cell>
        </table:table-row>
      </table:table>
      <text:p text:style-name="P25"/>
      <text:p text:style-name="P27"><text:span text:style-name="T3">Je suis un développeur passionné </text:span><text:span text:style-name="T4">et </text:span><text:span text:style-name="T5">rigoureux </text:span><text:span text:style-name="T6">spécialisé en programmation de moteur de </text:span><text:span text:style-name="T10">rendus 3d </text:span><text:span text:style-name="T6">et en architecture bas niveau. J’ai </text:span><text:span text:style-name="T7">beaucoup de projets personnels à mon actif ainsi qu’</text:span><text:span text:style-name="T8">une expérience professionnelle d’un an et demi dans un petit studio de jeu vidéo en tant que développeur moteur.</text:span></text:p>
      <text:h text:style-name="P43" text:outline-level="1" text:is-list-header="true">COMPÉTENCES<text:span text:style-name="T14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8">Langages :</text:p>
          </table:table-cell>
          <table:table-cell table:style-name="Table13.A1" office:value-type="string">
            <text:p text:style-name="P21">C++, C#, <text:span text:style-name="T63">C</text:span><text:span text:style-name="T64">, </text:span><text:span text:style-name="T61">x86 Assembly</text:span>, <text:span text:style-name="T94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28">Technologies :</text:p>
          </table:table-cell>
          <table:table-cell table:style-name="Table13.A1" office:value-type="string">
            <text:p text:style-name="P21"><text:span text:style-name="T70">Vulkan, DirectX </text:span><text:span text:style-name="T74">11, DirectX 12</text:span><text:span text:style-name="T70">, Metal, </text:span><text:span text:style-name="T75">OpenGL</text:span><text:span text:style-name="T70">, </text:span><text:span text:style-name="T69">Unity, Unreal, Git, </text:span><text:span text:style-name="T73">Linux</text:span></text:p>
          </table:table-cell>
        </table:table-row>
        <table:table-row>
          <table:table-cell table:style-name="Table13.A1" office:value-type="string">
            <text:p text:style-name="P30">Domaines :</text:p>
          </table:table-cell>
          <table:table-cell table:style-name="Table13.A1" office:value-type="string">
            <text:p text:style-name="P20"><text:span text:style-name="T76">Moteurs de </text:span><text:span text:style-name="T80">jeux</text:span><text:span text:style-name="T76">, </text:span><text:span text:style-name="T79">Langages de programmation, </text:span><text:span text:style-name="T78">Fullstack, </text:span><text:span text:style-name="T77">M</text:span><text:span text:style-name="T71">aths, </text:span><text:span text:style-name="T72">Multithreading, </text:span><text:span text:style-name="T79">Programmation bas niveau, </text:span><text:span text:style-name="T72">Programmation temps réel</text:span></text:p>
          </table:table-cell>
        </table:table-row>
        <table:table-row table:style-name="Table13.4">
          <table:table-cell table:style-name="Table13.A1" office:value-type="string">
            <text:p text:style-name="P29">Langues :</text:p>
          </table:table-cell>
          <table:table-cell table:style-name="Table13.A1" office:value-type="string">
            <text:p text:style-name="P19">Français, Anglais</text:p>
          </table:table-cell>
        </table:table-row>
      </table:table>
      <text:h text:style-name="P44" text:outline-level="1" text:is-list-header="true">EXPÉRIENCES PROFESSIONNELL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Freelancing</text:p>
          </table:table-cell>
          <table:table-cell table:style-name="Table2.A1" office:value-type="string">
            <text:p text:style-name="P6"><text:span text:style-name="T26">Janvier 2026 </text:span><text:span text:style-name="T21">– </text:span><text:span text:style-name="T26">présent</text:span></text:p>
          </table:table-cell>
        </table:table-row>
      </table:table>
      <text:p text:style-name="P57"><text:span text:style-name="T93">Missions freelance dans le web (</text:span><text:span text:style-name="T102">fullstack </text:span><text:span text:style-name="T93">VueJS, NestJS, 3D ThreeJS, PHP Symfon</text:span><text:span text:style-name="T95">y</text:span><text:span text:style-name="T93">) :</text:span></text:p>
      <text:p text:style-name="P59">Shop de trophée de randonnée 3D (VueJS, ThreeJS, Python Flask) :</text:p>
      <text:list text:style-name="L6">
        <text:list-item>
          <text:p text:style-name="P58">Génération 3D de trophée à partir de données GPS et d’élevation avec ThreeJS</text:p>
        </text:list-item>
        <text:list-item>
          <text:p text:style-name="P58">Gestion des pa<text:span text:style-name="T107">iements avec Stripe</text:span></text:p>
        </text:list-item>
      </text:list>
      <text:p text:style-name="P11"><text:span text:style-name="T13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7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2"><text:span text:style-name="T31">Développement d’un </text:span><text:span text:style-name="T32">moteur de </text:span><text:span text:style-name="T31">jeu vidéo, moteur de rendu et </text:span><text:span text:style-name="T33">é</text:span><text:span text:style-name="T31">diteur en </text:span><text:span text:style-name="T88">C++</text:span><text:span text:style-name="T31">, </text:span><text:span text:style-name="T91">DirectX</text:span><text:span text:style-name="T31"> et </text:span><text:span text:style-name="T89">Metal</text:span><text:span text:style-name="T31"> chez Fomenko </text:span><text:span text:style-name="T103">pour un jeu d’aventure/énigmes</text:span><text:span text:style-name="T31">:</text:span></text:p>
      <text:list text:style-name="L1">
        <text:list-item>
          <text:p text:style-name="P51">Moteur de rendu PBR, shadow maps, SSAO, API d’abstraction graphique</text:p>
        </text:list-item>
        <text:list-item>
          <text:p text:style-name="P51">Framework d’interface graphique</text:p>
        </text:list-item>
        <text:list-item>
          <text:p text:style-name="P51">Editeur de monde et placement d’objets</text:p>
        </text:list-item>
        <text:list-item>
          <text:p text:style-name="P51">Outils de painting de terrain et de végétation</text:p>
        </text:list-item>
      </text:list>
      <text:h text:style-name="P46" text:outline-level="1" text:is-list-header="true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<text:span text:style-name="T84">Vk-Engine, m</text:span><text:span text:style-name="T83">oteur de jeu</text:span></text:p>
          </table:table-cell>
          <table:table-cell table:style-name="Table9.A1" office:value-type="string">
            <text:p text:style-name="P37">202<text:span text:style-name="T34">4 - </text:span><text:span text:style-name="T35">présent</text:span></text:p>
          </table:table-cell>
        </table:table-row>
      </table:table>
      <text:p text:style-name="P14">Moteur de jeu <text:span text:style-name="T36">avec un moteur de rendu </text:span>en <text:span text:style-name="T90">C++</text:span><text:span text:style-name="T92"> et </text:span><text:span text:style-name="T87">Vulkan</text:span><text:span text:style-name="T37">, </text:span><text:span text:style-name="T36">un</text:span><text:span text:style-name="T37"> </text:span>système d’entité<text:span text:style-name="T37">s</text:span>, <text:span text:style-name="T36">un </text:span>système d’assets, <text:span text:style-name="T85">un éditeur et un moteur physique :</text:span></text:p>
      <text:list text:style-name="L2">
        <text:list-item>
          <text:p text:style-name="P52">Moteur de rendu forward clustered,</text:p>
        </text:list-item>
        <text:list-item>
          <text:p text:style-name="P55"><text:span text:style-name="T99">M</text:span><text:span text:style-name="T86">atériaux PBR, </text:span><text:span text:style-name="T101">image based lighting</text:span><text:span text:style-name="T86">, bloom, parallax occlusion mapping, </text:span><text:span text:style-name="T96">shadow maps, </text:span><text:span text:style-name="T100">skybox HDR</text:span></text:p>
        </text:list-item>
        <text:list-item>
          <text:p text:style-name="P56">Animations squelettales</text:p>
        </text:list-item>
        <text:list-item>
          <text:p text:style-name="P53">Système d’entités et de composants performant</text:p>
        </text:list-item>
        <text:list-item>
          <text:p text:style-name="P54">Editeur ImGui complet : multi-viewport, gestion de scènes, <text:span text:style-name="T97">éditeur de matériaux</text:span></text:p>
        </text:list-item>
        <text:list-item>
          <text:p text:style-name="P54">Intégration <text:span text:style-name="T98">avec le </text:span>moteur physique Jolt</text:p>
        </text:list-item>
      </text:list>
      <text:p text:style-name="P33"/>
      <text:p text:style-name="P33"/>
      <text:p text:style-name="P33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7">Minecraft clone</text:p>
          </table:table-cell>
          <table:table-cell table:style-name="Table4.A1" office:value-type="string">
            <text:p text:style-name="P38">2023</text:p>
          </table:table-cell>
        </table:table-row>
      </table:table>
      <text:p text:style-name="P1"><text:span text:style-name="T39">Recréation du jeu vidéo </text:span><text:span text:style-name="T40">Minecraft </text:span><text:span text:style-name="T39">en </text:span><text:span text:style-name="T53">C++</text:span><text:span text:style-name="T41"> </text:span><text:span text:style-name="T39">avec </text:span><text:span text:style-name="T54">OpenGL </text:span><text:span text:style-name="T40">:</text:span></text:p>
      <text:list text:style-name="L3">
        <text:list-item>
          <text:p text:style-name="P60"><text:span text:style-name="T45">G</text:span><text:span text:style-name="T42">énération de terrain basée sur le même fonctionneme</text:span><text:span text:style-name="T43">nt que le </text:span><text:span text:style-name="T42">jeu original</text:span></text:p>
        </text:list-item>
        <text:list-item>
          <text:p text:style-name="P63"><text:span text:style-name="T42">R</text:span><text:span text:style-name="T38">endus de chunks, gestion de la transparence, animations</text:span></text:p>
        </text:list-item>
        <text:list-item>
          <text:p text:style-name="P64"><text:span text:style-name="T42">C</text:span><text:span text:style-name="T38">ollisions avec le terrain</text:span></text:p>
        </text:list-item>
        <text:list-item>
          <text:p text:style-name="P60"><text:span text:style-name="T59">Editeur </text:span><text:span text:style-name="T60">avec la librairie ImGui</text:span></text:p>
        </text:list-item>
      </text:list>
      <text:p text:style-name="P1"><text:span text:style-name="T6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Langage de programmation</text:p>
          </table:table-cell>
          <table:table-cell table:style-name="Table8.A1" office:value-type="string">
            <text:p text:style-name="P39">2024 - présent</text:p>
          </table:table-cell>
        </table:table-row>
      </table:table>
      <text:p text:style-name="P13"><text:span text:style-name="T57">Développement d’un langage de programmation </text:span><text:span text:style-name="T58">bas niveau :</text:span></text:p>
      <text:list text:style-name="L4">
        <text:list-item>
          <text:p text:style-name="P65">Compilation vers un bytecode custom</text:p>
        </text:list-item>
        <text:list-item>
          <text:p text:style-name="P66">Typage statique</text:p>
        </text:list-item>
        <text:list-item>
          <text:p text:style-name="P66">Structs, pointeurs, tableaux, fonctions avec overloading</text:p>
        </text:list-item>
        <text:list-item>
          <text:p text:style-name="P66">Appels dynamiques à des librairies C</text:p>
        </text:list-item>
        <text:list-item>
          <text:p text:style-name="P61"><text:span text:style-name="T48">Exécution d</text:span><text:span text:style-name="T50">e code </text:span><text:span text:style-name="T48">arbitraire au compile time</text:span></text:p>
        </text:list-item>
      </text:list>
      <text:p text:style-name="P2"><text:span text:style-name="T44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Jeu de pong en ligne</text:p>
          </table:table-cell>
          <table:table-cell table:style-name="Table10.A1" office:value-type="string">
            <text:p text:style-name="P40">2023</text:p>
          </table:table-cell>
        </table:table-row>
      </table:table>
      <text:p text:style-name="P3"><text:span text:style-name="T46">Application web full-stack en </text:span><text:span text:style-name="T56">Typescript</text:span><text:span text:style-name="T46"> avec </text:span><text:span text:style-name="T55">VueJS</text:span><text:span text:style-name="T46"> et </text:span><text:span text:style-name="T55">NestJS </text:span><text:span text:style-name="T46">:</text:span></text:p>
      <text:list text:style-name="L5">
        <text:list-item>
          <text:p text:style-name="P62"><text:span text:style-name="T49">J</text:span><text:span text:style-name="T47">eu de pong </text:span><text:span text:style-name="T46">basé sur </text:span><text:span text:style-name="T52">Websockets</text:span></text:p>
        </text:list-item>
        <text:list-item>
          <text:p text:style-name="P62"><text:span text:style-name="T51">S</text:span><text:span text:style-name="T46">ystème d’authentification </text:span><text:span text:style-name="T51">sécurisé </text:span><text:span text:style-name="T46">2FA,</text:span></text:p>
        </text:list-item>
        <text:list-item>
          <text:p text:style-name="P62"><text:span text:style-name="T49">C</text:span><text:span text:style-name="T46">hat en temps réel </text:span><text:span text:style-name="T49">avec channels </text:span><text:span text:style-name="T51">publics/privés, rôles utilisateurs, messages directs</text:span></text:p>
        </text:list-item>
        <text:list-item>
          <text:p text:style-name="P68"><text:span text:style-name="T105">S</text:span><text:span text:style-name="T104">ystème de profils joueur avec historique des matchs, statistiques et classements</text:span></text:p>
        </text:list-item>
        <text:list-item>
          <text:p text:style-name="P68"><text:span text:style-name="T46">Architecture microservices avec NesJS, base de donnée </text:span><text:span text:style-name="T52">PostgreSQL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45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9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2"><text:span text:style-name="T62"><text:s/></text:span><text:span text:style-name="T27">2021 - </text:span><text:span text:style-name="T29">2026</text:span></text:p>
                </table:table-cell>
              </table:table-row>
            </table:table>
            <text:p text:style-name="P34">Expert en architecture informatique</text:p>
            <text:p text:style-name="P32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5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2"><text:span text:style-name="T62"><text:s/></text:span><text:span text:style-name="T27">2</text:span><text:span text:style-name="T28">01</text:span><text:span text:style-name="T30">7</text:span><text:span text:style-name="T28"> - 2020</text:span></text:p>
                </table:table-cell>
              </table:table-row>
            </table:table>
            <text:p text:style-name="P36">Bac S option Sciences de l’Ingénieur</text:p>
          </table:table-cell>
        </table:table-row>
      </table:table>
      <text:h text:style-name="P4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14T03:26:39.213093308</dc:date>
    <meta:editing-duration>PT11H10M29S</meta:editing-duration>
    <meta:editing-cycles>179</meta:editing-cycles>
    <meta:generator>LibreOffice/24.2.7.2$Linux_X86_64 LibreOffice_project/420$Build-2</meta:generator>
    <meta:print-date>2026-06-10T18:38:41.758996183</meta:print-date>
    <meta:printed-by>PDF files</meta:printed-by>
    <meta:document-statistic meta:table-count="13" meta:image-count="0" meta:object-count="0" meta:page-count="2" meta:paragraph-count="75" meta:word-count="494" meta:character-count="3142" meta:non-whitespace-character-count="2745"/>
  </office:meta>
</office:document-meta>
</file>